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6800000036D9845269.png" manifest:media-type="image/png"/>
  <manifest:file-entry manifest:full-path="Pictures/100000010000065A0000008025FAF4CC.png" manifest:media-type="image/png"/>
  <manifest:file-entry manifest:full-path="Pictures/10000001000003E8000000D887295184.png" manifest:media-type="image/png"/>
  <manifest:file-entry manifest:full-path="Pictures/100000010000095C000000A2559A9040.png" manifest:media-type="image/png"/>
  <manifest:file-entry manifest:full-path="Pictures/10000001000001630000001FBE9660E2.png" manifest:media-type="image/png"/>
  <manifest:file-entry manifest:full-path="Pictures/100000010000098E000000D69D03D2A1.png" manifest:media-type="image/png"/>
  <manifest:file-entry manifest:full-path="Pictures/100000010000063A00000038313F1DEF.png" manifest:media-type="image/png"/>
  <manifest:file-entry manifest:full-path="Pictures/10000001000002F4000000B62319D4E2.png" manifest:media-type="image/png"/>
  <manifest:file-entry manifest:full-path="Pictures/1000000100000670000000EC4EC374B3.png" manifest:media-type="image/png"/>
  <manifest:file-entry manifest:full-path="Pictures/10000001000009A4000000B6650941AC.png" manifest:media-type="image/png"/>
  <manifest:file-entry manifest:full-path="Pictures/100000010000033C000000E4FCE3D5D5.png" manifest:media-type="image/png"/>
  <manifest:file-entry manifest:full-path="Pictures/10000001000002A0000002B035DAAF66.png" manifest:media-type="image/png"/>
  <manifest:file-entry manifest:full-path="Pictures/10000001000003CF0000007029E83B79.png" manifest:media-type="image/png"/>
  <manifest:file-entry manifest:full-path="Pictures/10000001000002A2000002B49FA2E5DA.png" manifest:media-type="image/png"/>
  <manifest:file-entry manifest:full-path="Pictures/100000010000031400000062E2F881AA.png" manifest:media-type="image/png"/>
  <manifest:file-entry manifest:full-path="Pictures/10000001000006FA00000064105764C3.png" manifest:media-type="image/png"/>
  <manifest:file-entry manifest:full-path="Pictures/100000010000039A00000124599AC92C.png" manifest:media-type="image/png"/>
  <manifest:file-entry manifest:full-path="Pictures/100000010000022E0000007A8916E00C.png" manifest:media-type="image/png"/>
  <manifest:file-entry manifest:full-path="Pictures/100000010000028E0000012AA9F44CDD.png" manifest:media-type="image/png"/>
  <manifest:file-entry manifest:full-path="Pictures/10000001000004400000025EE9733B9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4.487cm" fo:margin-left="0.917cm" table:align="left"/>
    </style:style>
    <style:style style:name="Table1.A" style:family="table-column">
      <style:table-column-properties style:column-width="3.591cm"/>
    </style:style>
    <style:style style:name="Table1.B" style:family="table-column">
      <style:table-column-properties style:column-width="3.096cm"/>
    </style:style>
    <style:style style:name="Table1.C" style:family="table-column">
      <style:table-column-properties style:column-width="4.009cm"/>
    </style:style>
    <style:style style:name="Table1.D" style:family="table-column">
      <style:table-column-properties style:column-width="3.791cm"/>
    </style:style>
    <style:style style:name="Table1.A1" style:family="table-cell">
      <style:table-cell-properties fo:padding="0cm" fo:border="none" style:writing-mode="page"/>
    </style:style>
    <style:style style:name="Table2" style:family="table">
      <style:table-properties style:width="14.487cm" fo:margin-left="0.917cm" table:align="left"/>
    </style:style>
    <style:style style:name="Table2.A" style:family="table-column">
      <style:table-column-properties style:column-width="3.591cm"/>
    </style:style>
    <style:style style:name="Table2.B" style:family="table-column">
      <style:table-column-properties style:column-width="3.096cm"/>
    </style:style>
    <style:style style:name="Table2.C" style:family="table-column">
      <style:table-column-properties style:column-width="4.009cm"/>
    </style:style>
    <style:style style:name="Table2.D" style:family="table-column">
      <style:table-column-properties style:column-width="3.791cm"/>
    </style:style>
    <style:style style:name="Table2.A1" style:family="table-cell">
      <style:table-cell-properties fo:padding="0cm" fo:border="none" style:writing-mode="page"/>
    </style:style>
    <style:style style:name="P1" style:family="paragraph" style:parent-style-name="Standard">
      <style:paragraph-properties fo:text-align="center" style:justify-single-word="false"/>
      <style:text-properties style:font-name="Arial" style:text-underline-style="none" fo:font-weight="bold" officeooo:rsid="000961df" officeooo:paragraph-rsid="000961df" style:font-weight-asian="bold" style:font-weight-complex="bold"/>
    </style:style>
    <style:style style:name="P2" style:family="paragraph" style:parent-style-name="Standard">
      <style:paragraph-properties fo:text-align="center" style:justify-single-word="false"/>
      <style:text-properties style:font-name="Arial" style:text-underline-style="none" fo:font-weight="normal" officeooo:rsid="000b824c" officeooo:paragraph-rsid="000b824c" style:font-weight-asian="normal" style:font-weight-complex="normal"/>
    </style:style>
    <style:style style:name="P3" style:family="paragraph" style:parent-style-name="Standard">
      <style:text-properties style:font-name="Arial" fo:font-size="11pt" style:text-underline-style="none" officeooo:rsid="000b824c" officeooo:paragraph-rsid="000b824c" style:font-size-asian="9.60000038146973pt" style:font-size-complex="11pt"/>
    </style:style>
    <style:style style:name="P4" style:family="paragraph" style:parent-style-name="Standard">
      <style:text-properties style:font-name="Arial" fo:font-size="11pt" style:text-underline-style="none" officeooo:rsid="000b824c" officeooo:paragraph-rsid="00117159" style:font-size-asian="9.60000038146973pt" style:font-size-complex="11pt"/>
    </style:style>
    <style:style style:name="P5" style:family="paragraph" style:parent-style-name="Standard">
      <style:paragraph-properties fo:text-align="justify" style:justify-single-word="false"/>
      <style:text-properties style:font-name="Arial" fo:font-size="11pt" style:text-underline-style="none" officeooo:rsid="000b824c" officeooo:paragraph-rsid="00117159" style:font-size-asian="9.60000038146973pt" style:font-size-complex="11pt"/>
    </style:style>
    <style:style style:name="P6" style:family="paragraph" style:parent-style-name="Standard">
      <style:paragraph-properties fo:text-align="justify" style:justify-single-word="false"/>
      <style:text-properties style:font-name="Arial" fo:font-size="11pt" style:text-underline-style="none" officeooo:rsid="000b824c" officeooo:paragraph-rsid="000ce805" style:font-size-asian="9.60000038146973pt" style:font-size-complex="11pt"/>
    </style:style>
    <style:style style:name="P7" style:family="paragraph" style:parent-style-name="Standard">
      <style:paragraph-properties fo:text-align="justify" style:justify-single-word="false"/>
      <style:text-properties style:font-name="Arial" fo:font-size="11pt" style:text-underline-style="none" officeooo:rsid="000b824c" officeooo:paragraph-rsid="001369a7" style:font-size-asian="9.60000038146973pt" style:font-size-complex="11pt"/>
    </style:style>
    <style:style style:name="P8" style:family="paragraph" style:parent-style-name="Standard">
      <style:paragraph-properties fo:text-align="justify" style:justify-single-word="false"/>
      <style:text-properties style:font-name="Arial" fo:font-size="11pt" style:text-underline-style="none" officeooo:rsid="000b824c" officeooo:paragraph-rsid="001530c5" style:font-size-asian="9.60000038146973pt" style:font-size-complex="11pt"/>
    </style:style>
    <style:style style:name="P9" style:family="paragraph" style:parent-style-name="Standard">
      <style:paragraph-properties fo:text-align="justify" style:justify-single-word="false"/>
      <style:text-properties style:font-name="Arial" fo:font-size="11pt" style:text-underline-style="none" officeooo:rsid="000b824c" officeooo:paragraph-rsid="0016e953" style:font-size-asian="9.60000038146973pt" style:font-size-complex="11pt"/>
    </style:style>
    <style:style style:name="P10" style:family="paragraph" style:parent-style-name="Standard">
      <style:paragraph-properties fo:text-align="justify" style:justify-single-word="false"/>
      <style:text-properties style:font-name="Arial" fo:font-size="11pt" style:text-underline-style="none" officeooo:rsid="000b824c" officeooo:paragraph-rsid="001e2e38" style:font-size-asian="9.60000038146973pt" style:font-size-complex="11pt"/>
    </style:style>
    <style:style style:name="P11" style:family="paragraph" style:parent-style-name="Standard">
      <style:paragraph-properties fo:text-align="justify" style:justify-single-word="false"/>
      <style:text-properties style:font-name="Arial" fo:font-size="11pt" style:text-underline-style="none" officeooo:rsid="000b824c" officeooo:paragraph-rsid="00380b0c" style:font-size-asian="9.60000038146973pt" style:font-size-complex="11pt"/>
    </style:style>
    <style:style style:name="P12" style:family="paragraph" style:parent-style-name="Standard">
      <style:text-properties style:font-name="Arial" fo:font-size="11pt" style:text-underline-style="none" officeooo:rsid="000b824c" officeooo:paragraph-rsid="003b6ffd" style:font-size-asian="9.60000038146973pt" style:font-size-complex="11pt"/>
    </style:style>
    <style:style style:name="P13" style:family="paragraph" style:parent-style-name="Standard">
      <style:paragraph-properties fo:text-align="justify" style:justify-single-word="false"/>
      <style:text-properties style:font-name="Arial" fo:font-size="11pt" style:text-underline-style="none" officeooo:rsid="00117159" officeooo:paragraph-rsid="002690cc" style:font-size-asian="9.60000038146973pt" style:font-size-complex="11pt"/>
    </style:style>
    <style:style style:name="P14" style:family="paragraph" style:parent-style-name="Standard">
      <style:paragraph-properties fo:text-align="justify" style:justify-single-word="false"/>
      <style:text-properties style:font-name="Arial" fo:font-size="11pt" style:text-underline-style="none" officeooo:rsid="00117159" officeooo:paragraph-rsid="001f0033" style:font-size-asian="9.60000038146973pt" style:font-size-complex="11pt"/>
    </style:style>
    <style:style style:name="P15" style:family="paragraph" style:parent-style-name="Standard">
      <style:paragraph-properties fo:text-align="justify" style:justify-single-word="false"/>
      <style:text-properties style:font-name="Arial" fo:font-size="11pt" style:text-underline-style="none" officeooo:rsid="00117159" officeooo:paragraph-rsid="00117159" style:font-size-asian="9.60000038146973pt" style:font-size-complex="11pt"/>
    </style:style>
    <style:style style:name="P16" style:family="paragraph" style:parent-style-name="Standard">
      <style:paragraph-properties fo:text-align="justify" style:justify-single-word="false"/>
      <style:text-properties style:font-name="Arial" fo:font-size="11pt" style:text-underline-style="none" officeooo:rsid="00117159" officeooo:paragraph-rsid="001530c5" style:font-size-asian="9.60000038146973pt" style:font-size-complex="11pt"/>
    </style:style>
    <style:style style:name="P17" style:family="paragraph" style:parent-style-name="Standard">
      <style:paragraph-properties fo:text-align="justify" style:justify-single-word="false"/>
      <style:text-properties style:font-name="Arial" fo:font-size="11pt" style:text-underline-style="none" officeooo:rsid="0032280b" officeooo:paragraph-rsid="0032280b" style:font-size-asian="9.60000038146973pt" style:font-size-complex="11pt"/>
    </style:style>
    <style:style style:name="P18" style:family="paragraph" style:parent-style-name="Standard">
      <style:paragraph-properties fo:text-align="justify" style:justify-single-word="false"/>
      <style:text-properties style:font-name="Arial" fo:font-size="11pt" style:text-underline-style="none" officeooo:rsid="00236bab" officeooo:paragraph-rsid="00236bab" style:font-size-asian="9.60000038146973pt" style:font-size-complex="11pt"/>
    </style:style>
    <style:style style:name="P19" style:family="paragraph" style:parent-style-name="Standard">
      <style:paragraph-properties fo:text-align="justify" style:justify-single-word="false"/>
      <style:text-properties style:font-name="Arial" fo:font-size="11pt" style:text-underline-style="none" officeooo:rsid="00364e01" officeooo:paragraph-rsid="00550eb5" style:font-size-asian="9.60000038146973pt" style:font-size-complex="11pt"/>
    </style:style>
    <style:style style:name="P20" style:family="paragraph" style:parent-style-name="Standard">
      <style:paragraph-properties fo:text-align="justify" style:justify-single-word="false"/>
      <style:text-properties style:font-name="Arial" fo:font-size="11pt" style:text-underline-style="none" officeooo:rsid="00556a13" officeooo:paragraph-rsid="00556a13" style:font-size-asian="9.60000038146973pt" style:font-size-complex="11pt"/>
    </style:style>
    <style:style style:name="P21" style:family="paragraph" style:parent-style-name="Standard">
      <style:paragraph-properties fo:text-align="justify" style:justify-single-word="false"/>
      <style:text-properties style:font-name="Arial" fo:font-size="11pt" style:text-underline-style="none" officeooo:rsid="0056ba9d" officeooo:paragraph-rsid="0056ba9d" style:font-size-asian="9.60000038146973pt" style:font-size-complex="11pt"/>
    </style:style>
    <style:style style:name="P22" style:family="paragraph" style:parent-style-name="Standard">
      <style:text-properties style:font-name="Arial" fo:font-size="11pt" style:text-underline-style="none" officeooo:rsid="000b824c" officeooo:paragraph-rsid="003b6ffd" style:font-size-asian="11pt" style:font-size-complex="11pt"/>
    </style:style>
    <style:style style:name="P23" style:family="paragraph" style:parent-style-name="Standard">
      <style:paragraph-properties fo:text-align="justify" style:justify-single-word="false"/>
      <style:text-properties style:font-name="Arial" fo:font-size="11pt" style:text-underline-style="none" fo:font-weight="normal" officeooo:rsid="000961df" officeooo:paragraph-rsid="000961df"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style:font-name="Arial" fo:font-size="11pt" fo:font-weight="bold" officeooo:rsid="00117159" officeooo:paragraph-rsid="00117159" style:font-size-asian="9.60000038146973pt" style:font-weight-asian="bold" style:font-size-complex="11pt" style:font-weight-complex="bold"/>
    </style:style>
    <style:style style:name="P25" style:family="paragraph" style:parent-style-name="Table_20_Contents">
      <style:paragraph-properties fo:text-align="justify" style:justify-single-word="false"/>
      <style:text-properties style:font-name="Arial" fo:font-size="11pt" fo:font-weight="bold" officeooo:rsid="00117159" officeooo:paragraph-rsid="001530c5" style:font-size-asian="9.60000038146973pt" style:font-weight-asian="bold" style:font-size-complex="11pt" style:font-weight-complex="bold"/>
    </style:style>
    <style:style style:name="P26" style:family="paragraph" style:parent-style-name="Table_20_Contents">
      <style:paragraph-properties fo:text-align="justify" style:justify-single-word="false"/>
      <style:text-properties style:font-name="Arial" fo:font-size="11pt" officeooo:rsid="00117159" officeooo:paragraph-rsid="00117159" style:font-size-asian="9.60000038146973pt" style:font-size-complex="11pt"/>
    </style:style>
    <style:style style:name="P27" style:family="paragraph" style:parent-style-name="Table_20_Contents">
      <style:paragraph-properties fo:text-align="justify" style:justify-single-word="false"/>
      <style:text-properties style:font-name="Arial" fo:font-size="11pt" officeooo:rsid="00117159" officeooo:paragraph-rsid="001530c5" style:font-size-asian="9.60000038146973pt" style:font-size-complex="11pt"/>
    </style:style>
    <style:style style:name="P28" style:family="paragraph" style:parent-style-name="Table_20_Contents">
      <style:paragraph-properties fo:text-align="justify" style:justify-single-word="false"/>
      <style:text-properties style:font-name="Arial" fo:font-size="11pt" officeooo:rsid="001530c5" officeooo:paragraph-rsid="001530c5" style:font-size-asian="9.60000038146973pt" style:font-size-complex="11pt"/>
    </style:style>
    <style:style style:name="P29" style:family="paragraph" style:parent-style-name="Table_20_Contents">
      <style:paragraph-properties fo:text-align="justify" style:justify-single-word="false"/>
      <style:text-properties style:font-name="Arial" fo:font-size="11pt" officeooo:rsid="0032280b" officeooo:paragraph-rsid="0032280b" style:font-size-asian="9.60000038146973pt" style:font-size-complex="11pt"/>
    </style:style>
    <style:style style:name="P30" style:family="paragraph" style:parent-style-name="Table_20_Contents">
      <style:paragraph-properties fo:text-align="justify" style:justify-single-word="false"/>
      <style:text-properties style:font-name="Arial" fo:font-size="11pt" officeooo:rsid="0016e953" officeooo:paragraph-rsid="0016e953" style:font-size-asian="9.60000038146973pt" style:font-size-complex="11pt"/>
    </style:style>
    <style:style style:name="P31" style:family="paragraph" style:parent-style-name="Table_20_Contents">
      <style:paragraph-properties fo:text-align="justify" style:justify-single-word="false"/>
      <style:text-properties style:font-name="Arial" fo:font-size="11pt" officeooo:rsid="00556a13" officeooo:paragraph-rsid="00556a13" style:font-size-asian="9.60000038146973pt" style:font-size-complex="11pt"/>
    </style:style>
    <style:style style:name="P32" style:family="paragraph" style:parent-style-name="Table_20_Contents">
      <style:paragraph-properties fo:text-align="justify" style:justify-single-word="false"/>
      <style:text-properties style:font-name="Arial" fo:font-size="11pt" officeooo:rsid="0056ba9d" officeooo:paragraph-rsid="0056ba9d" style:font-size-asian="9.60000038146973pt" style:font-size-complex="11pt"/>
    </style:style>
    <style:style style:name="P33" style:family="paragraph" style:parent-style-name="Standard">
      <style:paragraph-properties fo:text-align="justify" style:justify-single-word="false"/>
      <style:text-properties style:font-name="Arial" fo:font-size="11pt" fo:font-style="italic" style:text-underline-style="none" officeooo:rsid="001530c5" officeooo:paragraph-rsid="001530c5" style:font-size-asian="9.60000038146973pt" style:font-style-asian="italic" style:font-size-complex="11pt" style:font-style-complex="italic"/>
    </style:style>
    <style:style style:name="P34" style:family="paragraph" style:parent-style-name="Standard">
      <style:paragraph-properties fo:text-align="justify" style:justify-single-word="false"/>
      <style:text-properties style:font-name="Arial" fo:font-size="11pt" fo:font-style="italic" style:text-underline-style="none" officeooo:rsid="001530c5" officeooo:paragraph-rsid="001e2e38" style:font-size-asian="9.60000038146973pt" style:font-style-asian="italic" style:font-size-complex="11pt" style:font-style-complex="italic"/>
    </style:style>
    <style:style style:name="P35" style:family="paragraph" style:parent-style-name="Standard">
      <style:paragraph-properties fo:text-align="justify" style:justify-single-word="false"/>
      <style:text-properties style:font-name="Arial" fo:font-size="11pt" fo:font-style="italic" style:text-underline-style="none" officeooo:rsid="001530c5" officeooo:paragraph-rsid="00380b0c" style:font-size-asian="9.60000038146973pt" style:font-style-asian="italic" style:font-size-complex="11pt" style:font-style-complex="italic"/>
    </style:style>
    <style:style style:name="P36" style:family="paragraph" style:parent-style-name="Standard">
      <style:paragraph-properties fo:text-align="justify" style:justify-single-word="false"/>
      <style:text-properties style:font-name="Arial" fo:font-size="11pt" fo:font-style="italic" style:text-underline-style="none" officeooo:rsid="001530c5" officeooo:paragraph-rsid="00236bab" style:font-size-asian="9.60000038146973pt" style:font-style-asian="italic" style:font-size-complex="11pt" style:font-style-complex="italic"/>
    </style:style>
    <style:style style:name="P37" style:family="paragraph" style:parent-style-name="Standard">
      <style:paragraph-properties fo:text-align="justify" style:justify-single-word="false"/>
      <style:text-properties style:font-name="Arial" fo:font-size="11pt" fo:font-style="italic" style:text-underline-style="none" officeooo:rsid="0025979c" officeooo:paragraph-rsid="0025979c" style:font-size-asian="9.60000038146973pt" style:font-style-asian="italic" style:font-size-complex="11pt" style:font-style-complex="italic"/>
    </style:style>
    <style:style style:name="P38" style:family="paragraph" style:parent-style-name="Standard">
      <style:paragraph-properties fo:text-align="justify" style:justify-single-word="false"/>
      <style:text-properties style:font-name="Arial" fo:font-size="11pt" fo:font-style="italic" style:text-underline-style="none" officeooo:rsid="00380b0c" officeooo:paragraph-rsid="00380b0c" style:font-size-asian="9.60000038146973pt" style:font-style-asian="italic" style:font-size-complex="11pt" style:font-style-complex="italic"/>
    </style:style>
    <style:style style:name="P39" style:family="paragraph" style:parent-style-name="Standard">
      <style:paragraph-properties fo:text-align="justify" style:justify-single-word="false"/>
      <style:text-properties style:font-name="Arial" fo:font-size="11pt" fo:font-style="italic" style:text-underline-style="none" officeooo:rsid="002690cc" officeooo:paragraph-rsid="0027bfcb" style:font-size-asian="9.60000038146973pt" style:font-style-asian="italic" style:font-size-complex="11pt" style:font-style-complex="italic"/>
    </style:style>
    <style:style style:name="P40" style:family="paragraph" style:parent-style-name="Standard">
      <style:paragraph-properties fo:text-align="justify" style:justify-single-word="false"/>
      <style:text-properties style:font-name="Arial" fo:font-size="11pt" fo:font-style="italic" style:text-underline-style="none" officeooo:rsid="002690cc" officeooo:paragraph-rsid="0029a33f" style:font-size-asian="9.60000038146973pt" style:font-style-asian="italic" style:font-size-complex="11pt" style:font-style-complex="italic"/>
    </style:style>
    <style:style style:name="P41" style:family="paragraph" style:parent-style-name="Standard">
      <style:paragraph-properties fo:text-align="justify" style:justify-single-word="false"/>
      <style:text-properties style:font-name="Arial" fo:font-size="11pt" fo:font-style="italic" style:text-underline-style="none" officeooo:rsid="002690cc" officeooo:paragraph-rsid="002a93e4" style:font-size-asian="9.60000038146973pt" style:font-style-asian="italic" style:font-size-complex="11pt" style:font-style-complex="italic"/>
    </style:style>
    <style:style style:name="P4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Arial" fo:font-size="11pt" fo:font-style="italic" style:text-underline-style="none" officeooo:rsid="001f0033" officeooo:paragraph-rsid="0020a912" style:font-size-asian="9.60000038146973pt" style:font-style-asian="italic" style:font-size-complex="11pt" style:font-style-complex="italic"/>
    </style:style>
    <style:style style:name="P43" style:family="paragraph" style:parent-style-name="Standard">
      <style:paragraph-properties fo:text-align="justify" style:justify-single-word="false"/>
      <style:text-properties style:font-name="Arial" fo:font-size="11pt" fo:font-style="italic" style:text-underline-style="none" fo:font-weight="bold" officeooo:rsid="002690cc" officeooo:paragraph-rsid="002690cc" style:font-size-asian="9.60000038146973pt" style:font-style-asian="italic" style:font-weight-asian="bold" style:font-size-complex="11pt" style:font-style-complex="italic" style:font-weight-complex="bold"/>
    </style:style>
    <style:style style:name="P44" style:family="paragraph" style:parent-style-name="Standard">
      <style:paragraph-properties fo:text-align="justify" style:justify-single-word="false"/>
      <style:text-properties style:font-name="Arial" fo:font-size="11pt" fo:font-style="italic" style:text-underline-style="none" fo:font-weight="normal" officeooo:rsid="002690cc" officeooo:paragraph-rsid="0027bfcb" style:font-size-asian="9.60000038146973pt" style:font-style-asian="italic" style:font-weight-asian="normal" style:font-size-complex="11pt" style:font-style-complex="italic" style:font-weight-complex="normal"/>
    </style:style>
    <style:style style:name="P45" style:family="paragraph" style:parent-style-name="Standard">
      <style:paragraph-properties fo:text-align="justify" style:justify-single-word="false"/>
      <style:text-properties style:font-name="Arial" fo:font-size="11pt" fo:font-style="normal" style:text-underline-style="none" officeooo:rsid="0025979c" officeooo:paragraph-rsid="00380b0c" style:font-size-asian="9.60000038146973pt" style:font-style-asian="normal" style:font-size-complex="11pt" style:font-style-complex="normal"/>
    </style:style>
    <style:style style:name="P46" style:family="paragraph" style:parent-style-name="Standard">
      <style:paragraph-properties fo:text-align="justify" style:justify-single-word="false"/>
      <style:text-properties style:font-name="Arial" fo:font-size="11pt" fo:font-style="normal" style:text-underline-style="none" officeooo:rsid="0025979c" officeooo:paragraph-rsid="004144c0" style:font-size-asian="9.60000038146973pt" style:font-style-asian="normal" style:font-size-complex="11pt" style:font-style-complex="normal"/>
    </style:style>
    <style:style style:name="P47" style:family="paragraph" style:parent-style-name="Standard">
      <style:paragraph-properties fo:text-align="justify" style:justify-single-word="false"/>
      <style:text-properties style:font-name="Arial" fo:font-size="11pt" fo:font-style="normal" style:text-underline-style="none" officeooo:rsid="00380b0c" officeooo:paragraph-rsid="00380b0c" style:font-size-asian="9.60000038146973pt" style:font-style-asian="normal" style:font-size-complex="11pt" style:font-style-complex="normal"/>
    </style:style>
    <style:style style:name="P48" style:family="paragraph" style:parent-style-name="Standard">
      <style:paragraph-properties fo:text-align="justify" style:justify-single-word="false"/>
      <style:text-properties style:font-name="Arial" fo:font-size="11pt" fo:font-style="normal" style:text-underline-style="none" officeooo:rsid="00380b0c" officeooo:paragraph-rsid="0038599b" style:font-size-asian="9.60000038146973pt" style:font-style-asian="normal" style:font-size-complex="11pt" style:font-style-complex="normal"/>
    </style:style>
    <style:style style:name="P49" style:family="paragraph" style:parent-style-name="Standard">
      <style:paragraph-properties fo:text-align="justify" style:justify-single-word="false"/>
      <style:text-properties style:font-name="Arial" fo:font-size="11pt" fo:font-style="normal" style:text-underline-style="none" officeooo:rsid="00380b0c" officeooo:paragraph-rsid="0041633f" style:font-size-asian="9.60000038146973pt" style:font-style-asian="normal" style:font-size-complex="11pt" style:font-style-complex="normal"/>
    </style:style>
    <style:style style:name="P50" style:family="paragraph" style:parent-style-name="Standard">
      <style:paragraph-properties fo:text-align="justify" style:justify-single-word="false"/>
      <style:text-properties style:font-name="Arial" fo:font-size="11pt" fo:font-style="normal" style:text-underline-style="none" officeooo:rsid="005b26dc" officeooo:paragraph-rsid="005b26dc" style:font-size-asian="9.60000038146973pt" style:font-style-asian="normal" style:font-size-complex="11pt" style:font-style-complex="normal"/>
    </style:style>
    <style:style style:name="P51" style:family="paragraph" style:parent-style-name="Standard">
      <style:paragraph-properties fo:text-align="justify" style:justify-single-word="false"/>
      <style:text-properties style:font-name="Arial" fo:font-size="11pt" fo:font-style="normal" style:text-underline-style="none" fo:font-weight="bold" officeooo:rsid="002690cc" officeooo:paragraph-rsid="002690cc"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fo:color="#ffffff" loext:opacity="100%" style:font-name="Arial" fo:font-size="11pt" fo:font-style="italic" style:text-underline-style="none" officeooo:rsid="0025979c" officeooo:paragraph-rsid="0025979c" style:font-size-asian="9.60000038146973pt" style:font-style-asian="italic" style:font-size-complex="11pt" style:font-style-complex="italic"/>
    </style:style>
    <style:style style:name="P53" style:family="paragraph" style:parent-style-name="Standard">
      <style:paragraph-properties fo:text-align="justify" style:justify-single-word="false"/>
      <style:text-properties fo:color="#784b04" loext:opacity="100%" style:font-name="Arial" fo:font-size="11pt" fo:font-style="normal" style:text-underline-style="none" officeooo:rsid="002690cc" officeooo:paragraph-rsid="0038599b" style:font-size-asian="9.60000038146973pt" style:font-style-asian="normal" style:font-size-complex="11pt" style:font-style-complex="normal"/>
    </style:style>
    <style:style style:name="P54" style:family="paragraph" style:parent-style-name="Standard">
      <style:paragraph-properties fo:text-align="justify" style:justify-single-word="false"/>
      <style:text-properties officeooo:paragraph-rsid="0041633f"/>
    </style:style>
    <style:style style:name="P55" style:family="paragraph" style:parent-style-name="Standard">
      <style:paragraph-properties fo:text-align="justify" style:justify-single-word="false"/>
      <style:text-properties officeooo:paragraph-rsid="00380b0c"/>
    </style:style>
    <style:style style:name="P56" style:family="paragraph" style:parent-style-name="Standard">
      <style:paragraph-properties fo:text-align="justify" style:justify-single-word="false"/>
      <style:text-properties officeooo:paragraph-rsid="0025979c"/>
    </style:style>
    <style:style style:name="P5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officeooo:paragraph-rsid="00432fbe"/>
    </style:style>
    <style:style style:name="P5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officeooo:paragraph-rsid="00475ac3"/>
    </style:style>
    <style:style style:name="P59"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officeooo:paragraph-rsid="00475ac3"/>
    </style:style>
    <style:style style:name="P60" style:family="paragraph" style:parent-style-name="Standard">
      <style:paragraph-properties fo:text-align="justify" style:justify-single-word="false"/>
      <style:text-properties officeooo:paragraph-rsid="004144c0"/>
    </style:style>
    <style:style style:name="P6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officeooo:rsid="0050fbdc" officeooo:paragraph-rsid="0050fbdc"/>
    </style:style>
    <style:style style:name="P62" style:family="paragraph" style:parent-style-name="Standard">
      <style:paragraph-properties fo:text-align="justify" style:justify-single-word="false"/>
      <style:text-properties officeooo:rsid="00550eb5" officeooo:paragraph-rsid="00550eb5"/>
    </style:style>
    <style:style style:name="P63" style:family="paragraph" style:parent-style-name="Standard">
      <style:paragraph-properties fo:text-align="justify" style:justify-single-word="false"/>
      <style:text-properties officeooo:rsid="005ce88b" officeooo:paragraph-rsid="005ce88b"/>
    </style:style>
    <style:style style:name="P64" style:family="paragraph" style:parent-style-name="Standard" style:list-style-name="L1">
      <style:paragraph-properties fo:text-align="justify" style:justify-single-word="false"/>
      <style:text-properties officeooo:paragraph-rsid="001f0033"/>
    </style:style>
    <style:style style:name="P65" style:family="paragraph" style:parent-style-name="Standard" style:list-style-name="L2">
      <style:paragraph-properties fo:text-align="justify" style:justify-single-word="false"/>
      <style:text-properties officeooo:paragraph-rsid="0027bfcb"/>
    </style:style>
    <style:style style:name="P66" style:family="paragraph" style:parent-style-name="Standard" style:list-style-name="L3">
      <style:paragraph-properties fo:text-align="justify" style:justify-single-word="false"/>
      <style:text-properties officeooo:paragraph-rsid="005a8e95"/>
    </style:style>
    <style:style style:name="P67" style:family="paragraph" style:parent-style-name="Standard" style:list-style-name="L3">
      <style:paragraph-properties fo:text-align="justify" style:justify-single-word="false"/>
      <style:text-properties officeooo:paragraph-rsid="005ce88b"/>
    </style:style>
    <style:style style:name="P68" style:family="paragraph" style:parent-style-name="Standard" style:list-style-name="L3">
      <style:paragraph-properties fo:text-align="justify" style:justify-single-word="false"/>
      <style:text-properties officeooo:paragraph-rsid="0041633f"/>
    </style:style>
    <style:style style:name="P69" style:family="paragraph" style:parent-style-name="Standard" style:list-style-name="L4">
      <style:paragraph-properties fo:text-align="justify" style:justify-single-word="false"/>
      <style:text-properties officeooo:paragraph-rsid="002d437e"/>
    </style:style>
    <style:style style:name="P70" style:family="paragraph" style:parent-style-name="Standard" style:list-style-name="L4">
      <style:paragraph-properties fo:text-align="justify" style:justify-single-word="false"/>
      <style:text-properties officeooo:paragraph-rsid="005a19c2"/>
    </style:style>
    <style:style style:name="P71" style:family="paragraph" style:parent-style-name="Standard" style:list-style-name="L4">
      <style:paragraph-properties fo:text-align="justify" style:justify-single-word="false"/>
      <style:text-properties officeooo:paragraph-rsid="00380b0c"/>
    </style:style>
    <style:style style:name="P72" style:family="paragraph" style:parent-style-name="Standard" style:list-style-name="L3">
      <style:paragraph-properties fo:text-align="justify" style:justify-single-word="false"/>
      <style:text-properties officeooo:rsid="005ce88b" officeooo:paragraph-rsid="005ce88b"/>
    </style:style>
    <style:style style:name="P73" style:family="paragraph" style:parent-style-name="Standard" style:list-style-name="L4">
      <style:paragraph-properties fo:text-align="justify" style:justify-single-word="false"/>
      <style:text-properties style:font-name="Arial" fo:font-size="11pt" style:text-underline-style="none" officeooo:rsid="006171fe" officeooo:paragraph-rsid="006171fe" style:font-size-asian="9.60000038146973pt" style:font-size-complex="11pt"/>
    </style:style>
    <style:style style:name="P74" style:family="paragraph" style:parent-style-name="Standard" style:list-style-name="L4">
      <style:paragraph-properties fo:text-align="justify" style:justify-single-word="false"/>
      <style:text-properties officeooo:rsid="00550eb5" officeooo:paragraph-rsid="00550eb5"/>
    </style:style>
    <style:style style:name="P75" style:family="paragraph" style:parent-style-name="Standard" style:list-style-name="L4">
      <style:paragraph-properties fo:text-align="justify" style:justify-single-word="false"/>
      <style:text-properties officeooo:rsid="00525411" officeooo:paragraph-rsid="00525411"/>
    </style:style>
    <style:style style:name="T1" style:family="text">
      <style:text-properties fo:font-style="italic" style:font-style-asian="italic" style:font-style-complex="italic"/>
    </style:style>
    <style:style style:name="T2" style:family="text">
      <style:text-properties fo:font-style="italic" officeooo:rsid="00107107" style:font-style-asian="italic" style:font-style-complex="italic"/>
    </style:style>
    <style:style style:name="T3" style:family="text">
      <style:text-properties fo:font-style="italic" officeooo:rsid="00117159" style:font-style-asian="italic" style:font-style-complex="italic"/>
    </style:style>
    <style:style style:name="T4" style:family="text">
      <style:text-properties fo:font-style="italic" officeooo:rsid="001f0033" style:font-style-asian="italic" style:font-style-complex="italic"/>
    </style:style>
    <style:style style:name="T5" style:family="text">
      <style:text-properties fo:font-style="italic" officeooo:rsid="002690cc" style:font-style-asian="italic" style:font-style-complex="italic"/>
    </style:style>
    <style:style style:name="T6" style:family="text">
      <style:text-properties fo:font-style="italic" officeooo:rsid="003f31d3" style:font-style-asian="italic" style:font-style-complex="italic"/>
    </style:style>
    <style:style style:name="T7" style:family="text">
      <style:text-properties officeooo:rsid="000efe03"/>
    </style:style>
    <style:style style:name="T8" style:family="text">
      <style:text-properties officeooo:rsid="000ce805"/>
    </style:style>
    <style:style style:name="T9" style:family="text">
      <style:text-properties officeooo:rsid="000e043a"/>
    </style:style>
    <style:style style:name="T10" style:family="text">
      <style:text-properties officeooo:rsid="00107107"/>
    </style:style>
    <style:style style:name="T11" style:family="text">
      <style:text-properties fo:font-style="normal" style:font-style-asian="normal" style:font-style-complex="normal"/>
    </style:style>
    <style:style style:name="T12" style:family="text">
      <style:text-properties fo:font-style="normal" officeooo:rsid="0019fc74" style:font-style-asian="normal" style:font-style-complex="normal"/>
    </style:style>
    <style:style style:name="T13" style:family="text">
      <style:text-properties fo:font-style="normal" officeooo:rsid="00117159" style:font-style-asian="normal" style:font-style-complex="normal"/>
    </style:style>
    <style:style style:name="T14" style:family="text">
      <style:text-properties fo:font-style="normal" officeooo:rsid="001a3479" style:font-style-asian="normal" style:font-style-complex="normal"/>
    </style:style>
    <style:style style:name="T15" style:family="text">
      <style:text-properties fo:font-style="normal" officeooo:rsid="002690cc" style:font-style-asian="normal" style:font-style-complex="normal"/>
    </style:style>
    <style:style style:name="T16" style:family="text">
      <style:text-properties fo:font-style="normal" officeooo:rsid="001e2e38" style:font-style-asian="normal" style:font-style-complex="normal"/>
    </style:style>
    <style:style style:name="T17" style:family="text">
      <style:text-properties fo:font-style="normal" officeooo:rsid="000b824c" style:font-style-asian="normal" style:font-style-complex="normal"/>
    </style:style>
    <style:style style:name="T18" style:family="text">
      <style:text-properties fo:font-style="normal" officeooo:rsid="0020a912" style:font-style-asian="normal" style:font-style-complex="normal"/>
    </style:style>
    <style:style style:name="T19" style:family="text">
      <style:text-properties fo:font-style="normal" officeooo:rsid="00380b0c" style:font-style-asian="normal" style:font-style-complex="normal"/>
    </style:style>
    <style:style style:name="T20" style:family="text">
      <style:text-properties fo:font-style="normal" officeooo:rsid="002a93e4" style:font-style-asian="normal" style:font-style-complex="normal"/>
    </style:style>
    <style:style style:name="T21" style:family="text">
      <style:text-properties fo:font-style="normal" officeooo:rsid="0029a33f" style:font-style-asian="normal" style:font-style-complex="normal"/>
    </style:style>
    <style:style style:name="T22" style:family="text">
      <style:text-properties fo:font-style="normal" officeooo:rsid="003fb7c4" style:font-style-asian="normal" style:font-style-complex="normal"/>
    </style:style>
    <style:style style:name="T23" style:family="text">
      <style:text-properties officeooo:rsid="002690cc"/>
    </style:style>
    <style:style style:name="T24" style:family="text">
      <style:text-properties officeooo:rsid="0018ddb8"/>
    </style:style>
    <style:style style:name="T25" style:family="text">
      <style:text-properties style:text-position="super 58%"/>
    </style:style>
    <style:style style:name="T26" style:family="text">
      <style:text-properties style:text-position="super 58%" officeooo:rsid="0018ddb8"/>
    </style:style>
    <style:style style:name="T27" style:family="text">
      <style:text-properties style:text-position="super 58%" fo:font-style="normal" style:font-style-asian="normal" style:font-style-complex="normal"/>
    </style:style>
    <style:style style:name="T28" style:family="text">
      <style:text-properties style:text-position="super 58%" style:font-name="Arial" fo:font-size="11pt" fo:font-style="normal" style:text-underline-style="none" style:font-size-asian="9.60000038146973pt" style:font-style-asian="normal" style:font-size-complex="11pt" style:font-style-complex="normal"/>
    </style:style>
    <style:style style:name="T29" style:family="text">
      <style:text-properties style:text-position="super 58%" style:font-name="Arial" fo:font-size="11pt" fo:font-style="normal" style:text-underline-style="none" officeooo:rsid="002d437e" style:font-size-asian="9.60000038146973pt" style:font-style-asian="normal" style:font-size-complex="11pt" style:font-style-complex="normal"/>
    </style:style>
    <style:style style:name="T30" style:family="text">
      <style:text-properties style:text-position="super 58%" style:font-name="Arial" fo:font-size="11pt" fo:font-style="normal" style:text-underline-style="none" officeooo:rsid="004144c0" style:font-size-asian="9.60000038146973pt" style:font-style-asian="normal" style:font-size-complex="11pt" style:font-style-complex="normal"/>
    </style:style>
    <style:style style:name="T31" style:family="text">
      <style:text-properties style:text-position="super 58%" style:font-name="Arial" fo:font-size="11pt" style:text-underline-style="none" style:font-size-asian="9.60000038146973pt" style:font-size-complex="11pt"/>
    </style:style>
    <style:style style:name="T32" style:family="text">
      <style:text-properties style:text-position="super 58%" style:font-name="Arial" fo:font-size="11pt" style:text-underline-style="none" officeooo:rsid="0041633f" style:font-size-asian="9.60000038146973pt" style:font-size-complex="11pt"/>
    </style:style>
    <style:style style:name="T33" style:family="text">
      <style:text-properties style:text-position="super 58%" style:font-name="Arial" fo:font-size="11pt" style:text-underline-style="none" officeooo:rsid="00475ac3" style:font-size-asian="9.60000038146973pt" style:font-size-complex="11pt"/>
    </style:style>
    <style:style style:name="T34" style:family="text">
      <style:text-properties officeooo:rsid="001369a7"/>
    </style:style>
    <style:style style:name="T35" style:family="text">
      <style:text-properties fo:color="#784b04" loext:opacity="100%"/>
    </style:style>
    <style:style style:name="T36" style:family="text">
      <style:text-properties fo:color="#784b04" loext:opacity="100%" fo:font-style="normal" style:font-style-asian="normal" style:font-style-complex="normal"/>
    </style:style>
    <style:style style:name="T37" style:family="text">
      <style:text-properties fo:color="#784b04" loext:opacity="100%" fo:font-style="normal" officeooo:rsid="002690cc" style:font-style-asian="normal" style:font-style-complex="normal"/>
    </style:style>
    <style:style style:name="T38" style:family="text">
      <style:text-properties fo:color="#784b04" loext:opacity="100%" fo:font-style="normal" officeooo:rsid="0027bfcb" style:font-style-asian="normal" style:font-style-complex="normal"/>
    </style:style>
    <style:style style:name="T39" style:family="text">
      <style:text-properties fo:color="#784b04" loext:opacity="100%" fo:font-style="normal" officeooo:rsid="002a93e4" style:font-style-asian="normal" style:font-style-complex="normal"/>
    </style:style>
    <style:style style:name="T40" style:family="text">
      <style:text-properties fo:color="#784b04" loext:opacity="100%" fo:font-style="normal" officeooo:rsid="0029a33f" style:font-style-asian="normal" style:font-style-complex="normal"/>
    </style:style>
    <style:style style:name="T41" style:family="text">
      <style:text-properties fo:color="#784b04" loext:opacity="100%" officeooo:rsid="002690cc"/>
    </style:style>
    <style:style style:name="T42" style:family="text">
      <style:text-properties fo:color="#784b04" loext:opacity="100%" officeooo:rsid="0038599b"/>
    </style:style>
    <style:style style:name="T43" style:family="text">
      <style:text-properties fo:color="#784b04" loext:opacity="100%" style:font-name="Arial" fo:font-size="11pt" fo:font-style="normal" style:text-underline-style="none" officeooo:rsid="002690cc" style:font-size-asian="9.60000038146973pt" style:font-style-asian="normal" style:font-size-complex="11pt" style:font-style-complex="normal"/>
    </style:style>
    <style:style style:name="T44" style:family="text">
      <style:text-properties fo:color="#784b04" loext:opacity="100%" style:font-name="Arial" fo:font-size="11pt" fo:font-style="normal" style:text-underline-style="none" officeooo:rsid="0027bfcb" style:font-size-asian="9.60000038146973pt" style:font-style-asian="normal" style:font-size-complex="11pt" style:font-style-complex="normal"/>
    </style:style>
    <style:style style:name="T45" style:family="text">
      <style:text-properties fo:color="#784b04" loext:opacity="100%" style:font-name="Arial" fo:font-size="11pt" fo:font-style="normal" style:text-underline-style="none" officeooo:rsid="002a93e4" style:font-size-asian="9.60000038146973pt" style:font-style-asian="normal" style:font-size-complex="11pt" style:font-style-complex="normal"/>
    </style:style>
    <style:style style:name="T46" style:family="text">
      <style:text-properties fo:color="#784b04" loext:opacity="100%" style:font-name="Arial" fo:font-size="11pt" fo:font-style="normal" style:text-underline-style="none" officeooo:rsid="0041633f" style:font-size-asian="9.60000038146973pt" style:font-style-asian="normal" style:font-size-complex="11pt" style:font-style-complex="normal"/>
    </style:style>
    <style:style style:name="T47" style:family="text">
      <style:text-properties fo:color="#784b04" loext:opacity="100%" style:font-name="Arial" fo:font-size="11pt" fo:font-style="normal" style:text-underline-style="none" fo:font-weight="normal" officeooo:rsid="002690cc" style:font-size-asian="9.60000038146973pt" style:font-style-asian="normal" style:font-weight-asian="normal" style:font-size-complex="11pt" style:font-style-complex="normal" style:font-weight-complex="normal"/>
    </style:style>
    <style:style style:name="T48" style:family="text">
      <style:text-properties fo:color="#784b04" loext:opacity="100%" officeooo:rsid="0041633f"/>
    </style:style>
    <style:style style:name="T49" style:family="text">
      <style:text-properties officeooo:rsid="001530c5"/>
    </style:style>
    <style:style style:name="T50" style:family="text">
      <style:text-properties officeooo:rsid="00380b0c"/>
    </style:style>
    <style:style style:name="T51" style:family="text">
      <style:text-properties officeooo:rsid="0038599b"/>
    </style:style>
    <style:style style:name="T52" style:family="text">
      <style:text-properties officeooo:rsid="003b6ffd"/>
    </style:style>
    <style:style style:name="T5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4" style:family="text">
      <style:text-properties officeooo:rsid="003d4f4f"/>
    </style:style>
    <style:style style:name="T55" style:family="text">
      <style:text-properties officeooo:rsid="003f6f10"/>
    </style:style>
    <style:style style:name="T56" style:family="text">
      <style:text-properties officeooo:rsid="003fb7c4"/>
    </style:style>
    <style:style style:name="T57" style:family="text">
      <style:text-properties style:font-name="Arial" fo:font-size="11pt" fo:font-style="normal" style:text-underline-style="none" style:font-size-asian="9.60000038146973pt" style:font-style-asian="normal" style:font-size-complex="11pt" style:font-style-complex="normal"/>
    </style:style>
    <style:style style:name="T58" style:family="text">
      <style:text-properties style:font-name="Arial" fo:font-size="11pt" fo:font-style="normal" style:text-underline-style="none" officeooo:rsid="003fb7c4" style:font-size-asian="9.60000038146973pt" style:font-style-asian="normal" style:font-size-complex="11pt" style:font-style-complex="normal"/>
    </style:style>
    <style:style style:name="T59" style:family="text">
      <style:text-properties style:font-name="Arial" fo:font-size="11pt" fo:font-style="normal" style:text-underline-style="none" officeooo:rsid="001f0033" style:font-size-asian="9.60000038146973pt" style:font-style-asian="normal" style:font-size-complex="11pt" style:font-style-complex="normal"/>
    </style:style>
    <style:style style:name="T60" style:family="text">
      <style:text-properties style:font-name="Arial" fo:font-size="11pt" fo:font-style="normal" style:text-underline-style="none" officeooo:rsid="000b824c" style:font-size-asian="9.60000038146973pt" style:font-style-asian="normal" style:font-size-complex="11pt" style:font-style-complex="normal"/>
    </style:style>
    <style:style style:name="T61" style:family="text">
      <style:text-properties style:font-name="Arial" fo:font-size="11pt" fo:font-style="normal" style:text-underline-style="none" officeooo:rsid="0020a912" style:font-size-asian="9.60000038146973pt" style:font-style-asian="normal" style:font-size-complex="11pt" style:font-style-complex="normal"/>
    </style:style>
    <style:style style:name="T62" style:family="text">
      <style:text-properties style:font-name="Arial" fo:font-size="11pt" fo:font-style="normal" style:text-underline-style="none" officeooo:rsid="00236bab" style:font-size-asian="9.60000038146973pt" style:font-style-asian="normal" style:font-size-complex="11pt" style:font-style-complex="normal"/>
    </style:style>
    <style:style style:name="T63" style:family="text">
      <style:text-properties style:font-name="Arial" fo:font-size="11pt" fo:font-style="normal" style:text-underline-style="none" officeooo:rsid="0027bfcb" style:font-size-asian="9.60000038146973pt" style:font-style-asian="normal" style:font-size-complex="11pt" style:font-style-complex="normal"/>
    </style:style>
    <style:style style:name="T64" style:family="text">
      <style:text-properties style:font-name="Arial" fo:font-size="11pt" fo:font-style="normal" style:text-underline-style="none" officeooo:rsid="00256366" style:font-size-asian="9.60000038146973pt" style:font-style-asian="normal" style:font-size-complex="11pt" style:font-style-complex="normal"/>
    </style:style>
    <style:style style:name="T65" style:family="text">
      <style:text-properties style:font-name="Arial" fo:font-size="11pt" fo:font-style="normal" style:text-underline-style="none" officeooo:rsid="00368fc0" style:font-size-asian="9.60000038146973pt" style:font-style-asian="normal" style:font-size-complex="11pt" style:font-style-complex="normal"/>
    </style:style>
    <style:style style:name="T66" style:family="text">
      <style:text-properties style:font-name="Arial" fo:font-size="11pt" fo:font-style="normal" style:text-underline-style="none" officeooo:rsid="0025979c" style:font-size-asian="9.60000038146973pt" style:font-style-asian="normal" style:font-size-complex="11pt" style:font-style-complex="normal"/>
    </style:style>
    <style:style style:name="T67" style:family="text">
      <style:text-properties style:font-name="Arial" fo:font-size="11pt" fo:font-style="normal" style:text-underline-style="none" officeooo:rsid="002c32a3" style:font-size-asian="9.60000038146973pt" style:font-style-asian="normal" style:font-size-complex="11pt" style:font-style-complex="normal"/>
    </style:style>
    <style:style style:name="T68" style:family="text">
      <style:text-properties style:font-name="Arial" fo:font-size="11pt" fo:font-style="normal" style:text-underline-style="none" officeooo:rsid="00380b0c" style:font-size-asian="9.60000038146973pt" style:font-style-asian="normal" style:font-size-complex="11pt" style:font-style-complex="normal"/>
    </style:style>
    <style:style style:name="T69" style:family="text">
      <style:text-properties style:font-name="Arial" fo:font-size="11pt" fo:font-style="normal" style:text-underline-style="none" officeooo:rsid="002d437e" style:font-size-asian="9.60000038146973pt" style:font-style-asian="normal" style:font-size-complex="11pt" style:font-style-complex="normal"/>
    </style:style>
    <style:style style:name="T70" style:family="text">
      <style:text-properties style:font-name="Arial" fo:font-size="11pt" fo:font-style="normal" style:text-underline-style="none" officeooo:rsid="004144c0" style:font-size-asian="9.60000038146973pt" style:font-style-asian="normal" style:font-size-complex="11pt" style:font-style-complex="normal"/>
    </style:style>
    <style:style style:name="T71" style:family="text">
      <style:text-properties style:font-name="Arial" fo:font-size="11pt" fo:font-style="normal" style:text-underline-style="none" officeooo:rsid="0041633f" style:font-size-asian="9.60000038146973pt" style:font-style-asian="normal" style:font-size-complex="11pt" style:font-style-complex="normal"/>
    </style:style>
    <style:style style:name="T72" style:family="text">
      <style:text-properties style:font-name="Arial" fo:font-size="11pt" fo:font-style="normal" style:text-underline-style="none" officeooo:rsid="00432fbe" style:font-size-asian="9.60000038146973pt" style:font-style-asian="normal" style:font-size-complex="11pt" style:font-style-complex="normal"/>
    </style:style>
    <style:style style:name="T73" style:family="text">
      <style:text-properties style:font-name="Arial" fo:font-size="11pt" fo:font-style="normal" style:text-underline-style="none" officeooo:rsid="00439c64" style:font-size-asian="9.60000038146973pt" style:font-style-asian="normal" style:font-size-complex="11pt" style:font-style-complex="normal"/>
    </style:style>
    <style:style style:name="T74" style:family="text">
      <style:text-properties style:font-name="Arial" fo:font-size="11pt" fo:font-style="normal" style:text-underline-style="none" officeooo:rsid="00475ac3" style:font-size-asian="9.60000038146973pt" style:font-style-asian="normal" style:font-size-complex="11pt" style:font-style-complex="normal"/>
    </style:style>
    <style:style style:name="T75" style:family="text">
      <style:text-properties style:font-name="Arial" fo:font-size="11pt" fo:font-style="normal" style:text-underline-style="none" officeooo:rsid="004995e6" style:font-size-asian="9.60000038146973pt" style:font-style-asian="normal" style:font-size-complex="11pt" style:font-style-complex="normal"/>
    </style:style>
    <style:style style:name="T76" style:family="text">
      <style:text-properties style:font-name="Arial" fo:font-size="11pt" fo:font-style="normal" style:text-underline-style="none" officeooo:rsid="004ac0d1" style:font-size-asian="9.60000038146973pt" style:font-style-asian="normal" style:font-size-complex="11pt" style:font-style-complex="normal"/>
    </style:style>
    <style:style style:name="T77" style:family="text">
      <style:text-properties style:font-name="Arial" fo:font-size="11pt" fo:font-style="normal" style:text-underline-style="none" officeooo:rsid="004c1123" style:font-size-asian="9.60000038146973pt" style:font-style-asian="normal" style:font-size-complex="11pt" style:font-style-complex="normal"/>
    </style:style>
    <style:style style:name="T78" style:family="text">
      <style:text-properties style:font-name="Arial" fo:font-size="11pt" fo:font-style="normal" style:text-underline-style="none" officeooo:rsid="0050fbdc" style:font-size-asian="9.60000038146973pt" style:font-style-asian="normal" style:font-size-complex="11pt" style:font-style-complex="normal"/>
    </style:style>
    <style:style style:name="T79" style:family="text">
      <style:text-properties style:font-name="Arial" fo:font-size="11pt" fo:font-style="normal" style:text-underline-style="none" officeooo:rsid="005a8e95" style:font-size-asian="9.60000038146973pt" style:font-style-asian="normal" style:font-size-complex="11pt" style:font-style-complex="normal"/>
    </style:style>
    <style:style style:name="T80" style:family="text">
      <style:text-properties style:font-name="Arial" fo:font-size="11pt" fo:font-style="normal" style:text-underline-style="none" officeooo:rsid="005ce88b" style:font-size-asian="9.60000038146973pt" style:font-style-asian="normal" style:font-size-complex="11pt" style:font-style-complex="normal"/>
    </style:style>
    <style:style style:name="T81" style:family="text">
      <style:text-properties style:font-name="Arial" fo:font-size="11pt" fo:font-style="italic" style:text-underline-style="none" style:font-size-asian="9.60000038146973pt" style:font-style-asian="italic" style:font-size-complex="11pt" style:font-style-complex="italic"/>
    </style:style>
    <style:style style:name="T82" style:family="text">
      <style:text-properties style:font-name="Arial" fo:font-size="11pt" fo:font-style="italic" style:text-underline-style="none" officeooo:rsid="001f0033" style:font-size-asian="9.60000038146973pt" style:font-style-asian="italic" style:font-size-complex="11pt" style:font-style-complex="italic"/>
    </style:style>
    <style:style style:name="T83" style:family="text">
      <style:text-properties style:font-name="Arial" fo:font-size="11pt" fo:font-style="italic" style:text-underline-style="none" officeooo:rsid="004144c0" style:font-size-asian="9.60000038146973pt" style:font-style-asian="italic" style:font-size-complex="11pt" style:font-style-complex="italic"/>
    </style:style>
    <style:style style:name="T84" style:family="text">
      <style:text-properties style:font-name="Arial" fo:font-size="11pt" fo:font-style="italic" style:text-underline-style="none" officeooo:rsid="0041633f" style:font-size-asian="9.60000038146973pt" style:font-style-asian="italic" style:font-size-complex="11pt" style:font-style-complex="italic"/>
    </style:style>
    <style:style style:name="T85" style:family="text">
      <style:text-properties style:font-name="Arial" fo:font-size="11pt" fo:font-style="italic" style:text-underline-style="none" officeooo:rsid="00432fbe" style:font-size-asian="9.60000038146973pt" style:font-style-asian="italic" style:font-size-complex="11pt" style:font-style-complex="italic"/>
    </style:style>
    <style:style style:name="T86" style:family="text">
      <style:text-properties style:font-name="Arial" fo:font-size="11pt" style:text-underline-style="none" style:font-size-asian="9.60000038146973pt" style:font-size-complex="11pt"/>
    </style:style>
    <style:style style:name="T87" style:family="text">
      <style:text-properties style:font-name="Arial" fo:font-size="11pt" style:text-underline-style="none" officeooo:rsid="00380b0c" style:font-size-asian="9.60000038146973pt" style:font-size-complex="11pt"/>
    </style:style>
    <style:style style:name="T88" style:family="text">
      <style:text-properties style:font-name="Arial" fo:font-size="11pt" style:text-underline-style="none" officeooo:rsid="00302673" style:font-size-asian="9.60000038146973pt" style:font-size-complex="11pt"/>
    </style:style>
    <style:style style:name="T89" style:family="text">
      <style:text-properties style:font-name="Arial" fo:font-size="11pt" style:text-underline-style="none" officeooo:rsid="00364a8a" style:font-size-asian="9.60000038146973pt" style:font-size-complex="11pt"/>
    </style:style>
    <style:style style:name="T90" style:family="text">
      <style:text-properties style:font-name="Arial" fo:font-size="11pt" style:text-underline-style="none" officeooo:rsid="00364e01" style:font-size-asian="9.60000038146973pt" style:font-size-complex="11pt"/>
    </style:style>
    <style:style style:name="T91" style:family="text">
      <style:text-properties style:font-name="Arial" fo:font-size="11pt" style:text-underline-style="none" officeooo:rsid="003fb7c4" style:font-size-asian="9.60000038146973pt" style:font-size-complex="11pt"/>
    </style:style>
    <style:style style:name="T92" style:family="text">
      <style:text-properties style:font-name="Arial" fo:font-size="11pt" style:text-underline-style="none" officeooo:rsid="0031431c" style:font-size-asian="9.60000038146973pt" style:font-size-complex="11pt"/>
    </style:style>
    <style:style style:name="T93" style:family="text">
      <style:text-properties style:font-name="Arial" fo:font-size="11pt" style:text-underline-style="none" officeooo:rsid="00342a5f" style:font-size-asian="9.60000038146973pt" style:font-size-complex="11pt"/>
    </style:style>
    <style:style style:name="T94" style:family="text">
      <style:text-properties style:font-name="Arial" fo:font-size="11pt" style:text-underline-style="none" officeooo:rsid="003189ad" style:font-size-asian="9.60000038146973pt" style:font-size-complex="11pt"/>
    </style:style>
    <style:style style:name="T95" style:family="text">
      <style:text-properties style:font-name="Arial" fo:font-size="11pt" style:text-underline-style="none" officeooo:rsid="0033acf2" style:font-size-asian="9.60000038146973pt" style:font-size-complex="11pt"/>
    </style:style>
    <style:style style:name="T96" style:family="text">
      <style:text-properties style:font-name="Arial" fo:font-size="11pt" style:text-underline-style="none" officeooo:rsid="0033f0bd" style:font-size-asian="9.60000038146973pt" style:font-size-complex="11pt"/>
    </style:style>
    <style:style style:name="T97" style:family="text">
      <style:text-properties style:font-name="Arial" fo:font-size="11pt" style:text-underline-style="none" officeooo:rsid="00356a84" style:font-size-asian="9.60000038146973pt" style:font-size-complex="11pt"/>
    </style:style>
    <style:style style:name="T98" style:family="text">
      <style:text-properties style:font-name="Arial" fo:font-size="11pt" style:text-underline-style="none" officeooo:rsid="003ff864" style:font-size-asian="9.60000038146973pt" style:font-size-complex="11pt"/>
    </style:style>
    <style:style style:name="T99" style:family="text">
      <style:text-properties style:font-name="Arial" fo:font-size="11pt" style:text-underline-style="none" officeooo:rsid="000b824c" style:font-size-asian="9.60000038146973pt" style:font-size-complex="11pt"/>
    </style:style>
    <style:style style:name="T100" style:family="text">
      <style:text-properties style:font-name="Arial" fo:font-size="11pt" style:text-underline-style="none" officeooo:rsid="004144c0" style:font-size-asian="9.60000038146973pt" style:font-size-complex="11pt"/>
    </style:style>
    <style:style style:name="T101" style:family="text">
      <style:text-properties style:font-name="Arial" fo:font-size="11pt" style:text-underline-style="none" officeooo:rsid="0041633f" style:font-size-asian="9.60000038146973pt" style:font-size-complex="11pt"/>
    </style:style>
    <style:style style:name="T102" style:family="text">
      <style:text-properties style:font-name="Arial" fo:font-size="11pt" style:text-underline-style="none" officeooo:rsid="00432fbe" style:font-size-asian="9.60000038146973pt" style:font-size-complex="11pt"/>
    </style:style>
    <style:style style:name="T103" style:family="text">
      <style:text-properties style:font-name="Arial" fo:font-size="11pt" style:text-underline-style="none" officeooo:rsid="00475ac3" style:font-size-asian="9.60000038146973pt" style:font-size-complex="11pt"/>
    </style:style>
    <style:style style:name="T104" style:family="text">
      <style:text-properties style:font-name="Arial" fo:font-size="11pt" style:text-underline-style="none" officeooo:rsid="004995e6" style:font-size-asian="9.60000038146973pt" style:font-size-complex="11pt"/>
    </style:style>
    <style:style style:name="T105" style:family="text">
      <style:text-properties style:font-name="Arial" fo:font-size="11pt" style:text-underline-style="none" officeooo:rsid="004ac0d1" style:font-size-asian="9.60000038146973pt" style:font-size-complex="11pt"/>
    </style:style>
    <style:style style:name="T106" style:family="text">
      <style:text-properties style:font-name="Arial" fo:font-size="11pt" style:text-underline-style="none" officeooo:rsid="004c1123" style:font-size-asian="9.60000038146973pt" style:font-size-complex="11pt"/>
    </style:style>
    <style:style style:name="T107" style:family="text">
      <style:text-properties style:font-name="Arial" fo:font-size="11pt" style:text-underline-style="none" officeooo:rsid="004cd7b5" style:font-size-asian="9.60000038146973pt" style:font-size-complex="11pt"/>
    </style:style>
    <style:style style:name="T108" style:family="text">
      <style:text-properties style:font-name="Arial" fo:font-size="11pt" style:text-underline-style="none" officeooo:rsid="00518926" style:font-size-asian="9.60000038146973pt" style:font-size-complex="11pt"/>
    </style:style>
    <style:style style:name="T109" style:family="text">
      <style:text-properties style:font-name="Arial" fo:font-size="11pt" style:text-underline-style="none" officeooo:rsid="0053fb50" style:font-size-asian="9.60000038146973pt" style:font-size-complex="11pt"/>
    </style:style>
    <style:style style:name="T110" style:family="text">
      <style:text-properties style:font-name="Arial" fo:font-size="11pt" style:text-underline-style="none" officeooo:rsid="0058a904" style:font-size-asian="9.60000038146973pt" style:font-size-complex="11pt"/>
    </style:style>
    <style:style style:name="T111" style:family="text">
      <style:text-properties style:font-name="Arial" fo:font-size="11pt" style:text-underline-style="none" officeooo:rsid="005a19c2" style:font-size-asian="9.60000038146973pt" style:font-size-complex="11pt"/>
    </style:style>
    <style:style style:name="T112" style:family="text">
      <style:text-properties style:font-name="Arial" fo:font-size="11pt" style:text-underline-style="none" officeooo:rsid="006259bf" style:font-size-asian="9.60000038146973pt" style:font-size-complex="11pt"/>
    </style:style>
    <style:style style:name="T113" style:family="text">
      <style:text-properties style:font-name="Arial" fo:font-size="11pt" style:text-underline-style="none" officeooo:rsid="00632e68" style:font-size-asian="9.60000038146973pt" style:font-size-complex="11pt"/>
    </style:style>
    <style:style style:name="T114" style:family="text">
      <style:text-properties style:font-name="Arial" fo:font-size="11pt" style:text-underline-style="none" officeooo:rsid="0063bbf9" style:font-size-asian="9.60000038146973pt" style:font-size-complex="11pt"/>
    </style:style>
    <style:style style:name="T115" style:family="text">
      <style:text-properties style:font-name="Arial" fo:font-size="11pt" style:text-underline-style="none" officeooo:rsid="0064b4f7" style:font-size-asian="9.60000038146973pt" style:font-size-complex="11pt"/>
    </style:style>
    <style:style style:name="T116" style:family="text">
      <style:text-properties officeooo:rsid="003ff864"/>
    </style:style>
    <style:style style:name="T117" style:family="text">
      <style:text-properties officeooo:rsid="0041633f"/>
    </style:style>
    <style:style style:name="T118" style:family="text">
      <style:text-properties fo:font-weight="normal" officeooo:rsid="000961df" style:font-size-asian="11pt" style:font-weight-asian="normal" style:font-weight-complex="normal"/>
    </style:style>
    <style:style style:name="T119" style:family="text">
      <style:text-properties officeooo:rsid="005a19c2"/>
    </style:style>
    <style:style style:name="T120" style:family="text">
      <style:text-properties officeooo:rsid="005f35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27cm" fo:text-indent="-0.635cm" fo:margin-left="1.4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62cm" fo:text-indent="-0.635cm" fo:margin-left="2.06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97cm" fo:text-indent="-0.635cm" fo:margin-left="2.69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32cm" fo:text-indent="-0.635cm" fo:margin-left="3.33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67cm" fo:text-indent="-0.635cm" fo:margin-left="3.96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02cm" fo:text-indent="-0.635cm" fo:margin-left="4.60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37cm" fo:text-indent="-0.635cm" fo:margin-left="5.23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72cm" fo:text-indent="-0.635cm" fo:margin-left="5.87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07cm" fo:text-indent="-0.635cm" fo:margin-left="6.50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42cm" fo:text-indent="-0.635cm" fo:margin-left="7.14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ther findings and curiosities</text:p>
      <text:p text:style-name="P1"/>
      <text:p text:style-name="P2">Daniel E. Severin</text:p>
      <text:p text:style-name="P2"/>
      <text:p text:style-name="P1"/>
      <text:p text:style-name="P12"><text:span text:style-name="T1">Note 1</text:span>: <text:span text:style-name="T52">Example of differences reported in log files corresponding to an error in BD digital catalog.</text:span></text:p>
      <text:p text:style-name="P22"/>
      <text:p text:style-name="P23"><text:span text:style-name="T52">In the digital catalog, t</text:span>he star BD +19°4871 reports 37.9 <text:span text:style-name="T52">minutes of</text:span> declination <text:span text:style-name="T52">(see below on the left). However,</text:span> in the printed catalog, it says 7.9 <text:span text:style-name="T52">(on the right)</text:span>, thus leading to a separation of 30 arcmin. In fact, star PPM 141127 is near the printed position, as expected. <text:span text:style-name="T52">More precisely, there are 30.8 arcmin between the digital coordinates of BD and PPM, indicating </text:span><text:span text:style-name="T54">a potential typo error.</text:span> </text:p>
      <text:p text:style-name="P23"><draw:frame draw:style-name="fr1" draw:name="Image9" text:anchor-type="char" svg:x="0.58cm" svg:y="0.39cm" svg:width="7.535cm" svg:height="4.193cm" draw:z-index="8"><draw:image xlink:href="Pictures/10000001000004400000025EE9733B96.png" xlink:type="simple" xlink:show="embed" xlink:actuate="onLoad" draw:mime-type="image/png"/></draw:frame></text:p>
      <text:p text:style-name="P23"/>
      <text:p text:style-name="P23"><draw:frame draw:style-name="fr1" draw:name="Image10" text:anchor-type="char" svg:x="9.193cm" svg:y="0.215cm" svg:width="6.8cm" svg:height="3.099cm" draw:z-index="9"><draw:image xlink:href="Pictures/100000010000028E0000012AA9F44CDD.png" xlink:type="simple" xlink:show="embed" xlink:actuate="onLoad" draw:mime-type="image/png"/></draw:frame></text:p>
      <text:p text:style-name="P23"/>
      <text:p text:style-name="P23"/>
      <text:p text:style-name="P6"><text:span text:style-name="T53"/></text:p>
      <text:p text:style-name="P6"><text:span text:style-name="T53"/></text:p>
      <text:p text:style-name="P6"><text:span text:style-name="T53"/></text:p>
      <text:p text:style-name="P6"><text:span text:style-name="T53"/></text:p>
      <text:p text:style-name="P6"><text:span text:style-name="T53"/></text:p>
      <text:p text:style-name="P6"><text:span text:style-name="T53"/></text:p>
      <text:p text:style-name="P6"><text:span text:style-name="T53"/></text:p>
      <text:p text:style-name="P6"><text:span text:style-name="T1">Note </text:span><text:span text:style-name="T6">2</text:span>: Identification error in SIMBAD propagated from IV/5.</text:p>
      <text:p text:style-name="P3"><draw:frame draw:style-name="fr1" draw:name="Image2" text:anchor-type="char" svg:x="9.543cm" svg:y="0.362cm" svg:width="7.616cm" svg:height="2.413cm" draw:z-index="0"><draw:image xlink:href="Pictures/100000010000039A00000124599AC92C.png" xlink:type="simple" xlink:show="embed" xlink:actuate="onLoad" draw:mime-type="image/png"/></draw:frame></text:p>
      <text:p text:style-name="P4">In catalog IV/5 (<text:span text:style-name="T7">also </text:span>4005), SD -22°5630 is identified<text:line-break/>to CD -22°15216 <text:span text:style-name="T8">and </text:span>this identification is also<text:line-break/>observed in SIMBAD, see <text:a xlink:type="simple" xlink:href="https://simbad.cds.unistra.fr/simbad/sim-id?Ident=HD+202025&amp;submit=submit+id" text:style-name="Internet_20_link" text:visited-style-name="Visited_20_Internet_20_Link"><text:span text:style-name="T8">here</text:span></text:a><text:span text:style-name="T8">.</text:span> <text:span text:style-name="T8">However, the angular <text:line-break/>distance between both stars is 4356 arcsec. In fact,<text:line-break/></text:span>SD -22°5630 <text:span text:style-name="T8">is the same as HD 202025 while </text:span>CD<text:line-break/>-22°15216 <text:span text:style-name="T8">is </text:span><text:span text:style-name="T9">probably TYC 6358-218-1. </text:span><text:span text:style-name="T10">On the other<text:line-break/>hand, HD 202025 is the same as CD -22°15266.<text:line-break/></text:span></text:p>
      <text:p text:style-name="P5"><text:span text:style-name="T10"><text:line-break/></text:span><text:span text:style-name="T2">Note </text:span><text:span text:style-name="T6">3</text:span><text:span text:style-name="T2">: </text:span><text:span text:style-name="T12">Differences f</text:span><text:span text:style-name="T13">ound in digital version of </text:span><text:span text:style-name="T3">Catálogo General Argentino</text:span><text:span text:style-name="T13">.</text:span></text:p>
      <text:p text:style-name="P6"/>
      <text:p text:style-name="P13">When comparing digital catalog (from GAVO Data Center) vs. printed catalog, <text:span text:style-name="T23">i.e. </text:span><text:span text:style-name="T4">Resultados del Observatorio Nacional Argentino, Vol X</text:span><text:span text:style-name="T5">I</text:span><text:span text:style-name="T4">V</text:span>, <text:span text:style-name="T23">and further </text:span>corrigenda, we found the following differences:</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Star</text:p>
          </table:table-cell>
          <table:table-cell table:style-name="Table1.A1" office:value-type="string">
            <text:p text:style-name="P24">Parameter</text:p>
          </table:table-cell>
          <table:table-cell table:style-name="Table1.A1" office:value-type="string">
            <text:p text:style-name="P24">Digital</text:p>
          </table:table-cell>
          <table:table-cell table:style-name="Table1.A1" office:value-type="string">
            <text:p text:style-name="P24">Printed</text:p>
          </table:table-cell>
        </table:table-row>
        <table:table-row>
          <table:table-cell table:style-name="Table1.A1" office:value-type="string">
            <text:p text:style-name="P26">GC 12588 <text:span text:style-name="T24">(1</text:span><text:span text:style-name="T26">st</text:span><text:span text:style-name="T24"> obs)</text:span></text:p>
          </table:table-cell>
          <table:table-cell table:style-name="Table1.A1" office:value-type="string">
            <text:p text:style-name="P26">RA</text:p>
          </table:table-cell>
          <table:table-cell table:style-name="Table1.A1" office:value-type="string">
            <text:p text:style-name="P26">36<text:span text:style-name="T25">s</text:span>03</text:p>
          </table:table-cell>
          <table:table-cell table:style-name="Table1.A1" office:value-type="string">
            <text:p text:style-name="P26">34<text:span text:style-name="T25">s</text:span>00</text:p>
          </table:table-cell>
        </table:table-row>
        <table:table-row>
          <table:table-cell table:style-name="Table1.A1" office:value-type="string">
            <text:p text:style-name="P26">GC 15231</text:p>
          </table:table-cell>
          <table:table-cell table:style-name="Table1.A1" office:value-type="string">
            <text:p text:style-name="P26">obs</text:p>
          </table:table-cell>
          <table:table-cell table:style-name="Table1.A1" office:value-type="string">
            <text:p text:style-name="P26">1 (reported 2<text:span text:style-name="T25">nd</text:span> one)</text:p>
          </table:table-cell>
          <table:table-cell table:style-name="Table1.A1" office:value-type="string">
            <text:p text:style-name="P26">2</text:p>
          </table:table-cell>
        </table:table-row>
        <table:table-row>
          <table:table-cell table:style-name="Table1.A1" office:value-type="string">
            <text:p text:style-name="P26">GC 16823</text:p>
          </table:table-cell>
          <table:table-cell table:style-name="Table1.A1" office:value-type="string">
            <text:p text:style-name="P26">RA</text:p>
          </table:table-cell>
          <table:table-cell table:style-name="Table1.A1" office:value-type="string">
            <text:p text:style-name="P26">05<text:span text:style-name="T25">s</text:span>39</text:p>
          </table:table-cell>
          <table:table-cell table:style-name="Table1.A1" office:value-type="string">
            <text:p text:style-name="P26">04<text:span text:style-name="T25">s</text:span>76</text:p>
          </table:table-cell>
        </table:table-row>
        <table:table-row>
          <table:table-cell table:style-name="Table1.A1" office:value-type="string">
            <text:p text:style-name="P26">GC 16823</text:p>
          </table:table-cell>
          <table:table-cell table:style-name="Table1.A1" office:value-type="string">
            <text:p text:style-name="P26">DE <text:span text:style-name="T34">(south)</text:span></text:p>
          </table:table-cell>
          <table:table-cell table:style-name="Table1.A1" office:value-type="string">
            <text:p text:style-name="P7">79°03'46''6</text:p>
          </table:table-cell>
          <table:table-cell table:style-name="Table1.A1" office:value-type="string">
            <text:p text:style-name="P7">27°07'14''5</text:p>
          </table:table-cell>
        </table:table-row>
      </table:table>
      <text:p text:style-name="P15"/>
      <text:p text:style-name="P5"/>
      <text:p text:style-name="P33">Note <text:span text:style-name="T55">4</text:span>: <text:span text:style-name="T14">Differences fo</text:span><text:span text:style-name="T11">und in digital version of </text:span><text:span text:style-name="T15">Gilliss</text:span><text:span text:style-name="T11"> catalog </text:span><text:span text:style-name="T37">[G]</text:span><text:span text:style-name="T11">:</text:span></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Star</text:p>
          </table:table-cell>
          <table:table-cell table:style-name="Table2.A1" office:value-type="string">
            <text:p text:style-name="P25">Parameter</text:p>
          </table:table-cell>
          <table:table-cell table:style-name="Table2.A1" office:value-type="string">
            <text:p text:style-name="P25">Digital</text:p>
          </table:table-cell>
          <table:table-cell table:style-name="Table2.A1" office:value-type="string">
            <text:p text:style-name="P25">Printed</text:p>
          </table:table-cell>
        </table:table-row>
        <table:table-row>
          <table:table-cell table:style-name="Table2.A1" office:value-type="string">
            <text:p text:style-name="P31">G 3497</text:p>
          </table:table-cell>
          <table:table-cell table:style-name="Table2.A1" office:value-type="string">
            <text:p text:style-name="P31">Identification</text:p>
          </table:table-cell>
          <table:table-cell table:style-name="Table2.A1" office:value-type="string">
            <text:p text:style-name="P20">GZC</text:p>
          </table:table-cell>
          <table:table-cell table:style-name="Table2.A1" office:value-type="string">
            <text:p text:style-name="P20">Gould</text:p>
          </table:table-cell>
        </table:table-row>
        <table:table-row>
          <table:table-cell table:style-name="Table2.A1" office:value-type="string">
            <text:p text:style-name="P27">G <text:span text:style-name="T49">5327</text:span></text:p>
          </table:table-cell>
          <table:table-cell table:style-name="Table2.A1" office:value-type="string">
            <text:p text:style-name="P27">RA</text:p>
          </table:table-cell>
          <table:table-cell table:style-name="Table2.A1" office:value-type="string">
            <text:p text:style-name="P8">36<text:span text:style-name="T25">s</text:span>91</text:p>
          </table:table-cell>
          <table:table-cell table:style-name="Table2.A1" office:value-type="string">
            <text:p text:style-name="P8">36<text:span text:style-name="T25">s</text:span>88</text:p>
          </table:table-cell>
        </table:table-row>
        <table:table-row>
          <table:table-cell table:style-name="Table2.A1" office:value-type="string">
            <text:p text:style-name="P28">G 5327</text:p>
          </table:table-cell>
          <table:table-cell table:style-name="Table2.A1" office:value-type="string">
            <text:p text:style-name="P28">DE (south)</text:p>
          </table:table-cell>
          <table:table-cell table:style-name="Table2.A1" office:value-type="string">
            <text:p text:style-name="P8">69°55'01''0</text:p>
          </table:table-cell>
          <table:table-cell table:style-name="Table2.A1" office:value-type="string">
            <text:p text:style-name="P8">65°55'1''2</text:p>
          </table:table-cell>
        </table:table-row>
        <table:table-row>
          <table:table-cell table:style-name="Table2.A1" office:value-type="string">
            <text:p text:style-name="P32">G 5437</text:p>
          </table:table-cell>
          <table:table-cell table:style-name="Table2.A1" office:value-type="string">
            <text:p text:style-name="P32">Identification</text:p>
          </table:table-cell>
          <table:table-cell table:style-name="Table2.A1" office:value-type="string">
            <text:p text:style-name="P21">GZC 08<text:span text:style-name="T25">h</text:span> 1155</text:p>
          </table:table-cell>
          <table:table-cell table:style-name="Table2.A1" office:value-type="string">
            <text:p text:style-name="P21">GZC 08<text:span text:style-name="T25">h</text:span> 1156</text:p>
          </table:table-cell>
        </table:table-row>
        <table:table-row>
          <table:table-cell table:style-name="Table2.A1" office:value-type="string">
            <text:p text:style-name="P17">G 6395</text:p>
          </table:table-cell>
          <table:table-cell table:style-name="Table2.A1" office:value-type="string">
            <text:p text:style-name="P29">Identification</text:p>
          </table:table-cell>
          <table:table-cell table:style-name="Table2.A1" office:value-type="string">
            <text:p text:style-name="P17">GC 13221</text:p>
          </table:table-cell>
          <table:table-cell table:style-name="Table2.A1" office:value-type="string">
            <text:p text:style-name="P17">Carinae</text:p>
          </table:table-cell>
        </table:table-row>
        <table:table-row>
          <table:table-cell table:style-name="Table2.A1" office:value-type="string">
            <text:p text:style-name="P9">G 8894</text:p>
          </table:table-cell>
          <table:table-cell table:style-name="Table2.A1" office:value-type="string">
            <text:p text:style-name="P30">RA</text:p>
          </table:table-cell>
          <table:table-cell table:style-name="Table2.A1" office:value-type="string">
            <text:p text:style-name="P9">41<text:span text:style-name="T25">m</text:span>05<text:span text:style-name="T25">s</text:span>51</text:p>
          </table:table-cell>
          <table:table-cell table:style-name="Table2.A1" office:value-type="string">
            <text:p text:style-name="P9">42<text:span text:style-name="T25">m</text:span>15<text:span text:style-name="T25">s</text:span>51</text:p>
          </table:table-cell>
        </table:table-row>
        <table:table-row>
          <table:table-cell table:style-name="Table2.A1" office:value-type="string">
            <text:p text:style-name="P9">G 13514</text:p>
          </table:table-cell>
          <table:table-cell table:style-name="Table2.A1" office:value-type="string">
            <text:p text:style-name="P27">RA</text:p>
          </table:table-cell>
          <table:table-cell table:style-name="Table2.A1" office:value-type="string">
            <text:p text:style-name="P9">35<text:span text:style-name="T25">m</text:span></text:p>
          </table:table-cell>
          <table:table-cell table:style-name="Table2.A1" office:value-type="string">
            <text:p text:style-name="P9">38<text:span text:style-name="T25">m</text:span></text:p>
          </table:table-cell>
        </table:table-row>
        <text:soft-page-break/>
        <table:table-row>
          <table:table-cell table:style-name="Table2.A1" office:value-type="string">
            <text:p text:style-name="P9">G 13514</text:p>
          </table:table-cell>
          <table:table-cell table:style-name="Table2.A1" office:value-type="string">
            <text:p text:style-name="P27">DE <text:span text:style-name="T34">(south)</text:span></text:p>
          </table:table-cell>
          <table:table-cell table:style-name="Table2.A1" office:value-type="string">
            <text:p text:style-name="P9">46''0</text:p>
          </table:table-cell>
          <table:table-cell table:style-name="Table2.A1" office:value-type="string">
            <text:p text:style-name="P9">46''7</text:p>
          </table:table-cell>
        </table:table-row>
      </table:table>
      <text:p text:style-name="P16"/>
      <text:p text:style-name="P10"/>
      <text:p text:style-name="P34">Note <text:span text:style-name="T55">5</text:span>: <text:span text:style-name="T14"><text:s/></text:span><text:span text:style-name="T16">Errors f</text:span><text:span text:style-name="T14">o</text:span><text:span text:style-name="T11">und in </text:span><text:span text:style-name="T16">printed</text:span><text:span text:style-name="T11"> version</text:span><text:span text:style-name="T16">s</text:span><text:span text:style-name="T11"> of </text:span><text:span text:style-name="T16">Argentine Catalogs not found in their corrigenda.</text:span></text:p>
      <text:p text:style-name="P34"><text:span text:style-name="T11"/></text:p>
      <text:list text:style-name="L1">
        <text:list-item>
          <text:p text:style-name="P64"><text:span text:style-name="T59">In </text:span><text:span text:style-name="T82">Resultados del Observatorio Nacional Argentino, Vol XV, </text:span><text:span text:style-name="T59">we find that the star 691 of pg. 67 reports a declination of 35</text:span><text:span text:style-name="T60">°</text:span><text:span text:style-name="T59">16</text:span><text:span text:style-name="T60">'</text:span><text:span text:style-name="T59">41</text:span><text:span text:style-name="T60">''</text:span><text:span text:style-name="T59">1 </text:span><text:span text:style-name="T61">(epoch 1881.0)</text:span><text:span text:style-name="T59">:</text:span></text:p>
        </text:list-item>
      </text:list>
      <text:p text:style-name="P42"><draw:frame draw:style-name="fr4" draw:name="Image1" text:anchor-type="char" svg:width="17cm" svg:height="0.951cm" draw:z-index="1"><draw:image xlink:href="Pictures/10000001000006FA00000064105764C3.png" xlink:type="simple" xlink:show="embed" xlink:actuate="onLoad" draw:mime-type="image/png"/></draw:frame><text:span text:style-name="T11">however </text:span><text:span text:style-name="T18">in the original observation of pg. 35, declination is </text:span><text:span text:style-name="T11">3</text:span><text:span text:style-name="T18">4</text:span><text:span text:style-name="T17">° </text:span><text:span text:style-name="T18">(see below </text:span><text:span text:style-name="T22">on the</text:span><text:span text:style-name="T18"> right), also </text:span><text:span text:style-name="T11">it is cross-identified with ZC 17</text:span><text:span text:style-name="T27">h</text:span><text:span text:style-name="T11"> 2848, </text:span><text:span text:style-name="T18">where it also reports </text:span><text:span text:style-name="T11">3</text:span><text:span text:style-name="T18">4</text:span><text:span text:style-name="T17">° </text:span><text:span text:style-name="T18">for a similar epoch (1875.0), see below </text:span><text:span text:style-name="T22">on the</text:span><text:span text:style-name="T18"> left:</text:span><draw:frame draw:style-name="fr1" draw:name="Image4" text:anchor-type="char" svg:x="8.731cm" svg:y="2.249cm" svg:width="5.876cm" svg:height="1.284cm" draw:z-index="3"><draw:image xlink:href="Pictures/100000010000022E0000007A8916E00C.png" xlink:type="simple" xlink:show="embed" xlink:actuate="onLoad" draw:mime-type="image/png"/></draw:frame></text:p>
      <text:p text:style-name="P18"><draw:frame draw:style-name="fr1" draw:name="Image3" text:anchor-type="char" svg:x="0.794cm" svg:y="0cm" svg:width="7.639cm" svg:height="0.951cm" draw:z-index="2"><draw:image xlink:href="Pictures/100000010000031400000062E2F881AA.png" xlink:type="simple" xlink:show="embed" xlink:actuate="onLoad" draw:mime-type="image/png"/></draw:frame></text:p>
      <text:p text:style-name="P18"/>
      <text:p text:style-name="P18"/>
      <text:p text:style-name="P36"><text:span text:style-name="T11"/></text:p>
      <text:list text:style-name="L2">
        <text:list-item>
          <text:p text:style-name="P65"><text:span text:style-name="T59">In </text:span><text:span text:style-name="T82">Resultados del Observatorio Nacional Argentino, Vol XV, </text:span><text:span text:style-name="T59">we find that the star </text:span><text:span text:style-name="T62">729</text:span><text:span text:style-name="T59"> of pg. 6</text:span><text:span text:style-name="T62">8</text:span><text:span text:style-name="T59"> </text:span><text:span text:style-name="T62">is identified with OA 17773 </text:span><text:span text:style-name="T43">[</text:span><text:span text:style-name="T44">OARS</text:span><text:span text:style-name="T43">]</text:span><text:span text:style-name="T63"> </text:span><text:span text:style-name="T62">which is clearly wrong when their positions are compared. The original observation, instead, reports that it is OA 11734; </text:span><text:span text:style-name="T64">below stars 727-733 and their original observations are shown</text:span><text:span text:style-name="T62">:</text:span></text:p>
        </text:list-item>
      </text:list>
      <text:p text:style-name="P52"><draw:frame draw:style-name="fr4" draw:name="Image6" text:anchor-type="char" svg:width="17cm" svg:height="2.434cm" draw:z-index="4"><draw:image xlink:href="Pictures/1000000100000670000000EC4EC374B3.png" xlink:type="simple" xlink:show="embed" xlink:actuate="onLoad" draw:mime-type="image/png"/></draw:frame><draw:frame draw:style-name="fr1" draw:name="Image7" text:anchor-type="char" svg:x="1.289cm" svg:y="2.699cm" svg:width="6.114cm" svg:height="6.278cm" draw:z-index="5"><draw:image xlink:href="Pictures/10000001000002A2000002B49FA2E5DA.png" xlink:type="simple" xlink:show="embed" xlink:actuate="onLoad" draw:mime-type="image/png"/></draw:frame><draw:frame draw:style-name="fr1" draw:name="Image8" text:anchor-type="char" svg:x="7.758cm" svg:y="2.658cm" svg:width="6.089cm" svg:height="6.234cm" draw:z-index="6"><draw:image xlink:href="Pictures/10000001000002A0000002B035DAAF66.png" xlink:type="simple" xlink:show="embed" xlink:actuate="onLoad" draw:mime-type="image/png"/></draw:frame><text:span text:style-name="T11">…...</text:span></text:p>
      <text:p text:style-name="P50"><text:tab/>Something similar occurs with star 340 of pg. 238, identified with GC 1325 (very far) but</text:p>
      <text:p text:style-name="P50"><text:tab/>with G 1325 in the original observation (pg 199):</text:p>
      <text:p text:style-name="P37"><draw:frame draw:style-name="fr1" draw:name="Image19" text:anchor-type="char" svg:x="12.28cm" svg:y="0.049cm" svg:width="5.14cm" svg:height="1.416cm" draw:z-index="18"><draw:image xlink:href="Pictures/100000010000033C000000E4FCE3D5D5.png" xlink:type="simple" xlink:show="embed" xlink:actuate="onLoad" draw:mime-type="image/png"/></draw:frame><draw:frame draw:style-name="fr1" draw:name="Image20" text:anchor-type="char" svg:x="-1.072cm" svg:y="0.386cm" svg:width="12.988cm" svg:height="0.958cm" draw:z-index="19"><draw:image xlink:href="Pictures/10000001000009A4000000B6650941AC.png" xlink:type="simple" xlink:show="embed" xlink:actuate="onLoad" draw:mime-type="image/png"/></draw:frame><text:span text:style-name="T11"/></text:p>
      <text:p text:style-name="P37"><text:span text:style-name="T11"/></text:p>
      <text:p text:style-name="P37"><text:span text:style-name="T11"/></text:p>
      <text:p text:style-name="P56"><text:span text:style-name="T65"/></text:p>
      <text:list text:style-name="L3">
        <text:list-header>
          <text:p text:style-name="P66"><text:span text:style-name="T65"/></text:p>
        </text:list-header>
        <text:list-item>
          <text:p text:style-name="P66"><text:span text:style-name="T59">In </text:span><text:span text:style-name="T82">Resultados del Observatorio Nacional Argentino, Vol XV, </text:span><text:span text:style-name="T59">we find that the star </text:span><text:span text:style-name="T79">1195</text:span><text:span text:style-name="T59"> of pg. </text:span><text:span text:style-name="T79">161</text:span><text:span text:style-name="T62"> </text:span><text:span text:style-name="T65">is misidentified with </text:span><text:span text:style-name="T66">OA </text:span><text:span text:style-name="T79">20291</text:span><text:span text:style-name="T65">, </text:span><text:span text:style-name="T79">however its position and the one for OA 20991 are near to each other, and the same as PPM 271859 (within 3 arcsec). Below, pg. 116 and 161:</text:span></text:p>
        </text:list-item>
      </text:list>
      <text:p text:style-name="P60"><draw:frame draw:style-name="fr1" draw:name="Image17" text:anchor-type="char" svg:x="13.04cm" svg:y="0.337cm" svg:width="4.487cm" svg:height="1.081cm" draw:z-index="16"><draw:image xlink:href="Pictures/10000001000002F4000000B62319D4E2.png" xlink:type="simple" xlink:show="embed" xlink:actuate="onLoad" draw:mime-type="image/png"/></draw:frame><draw:frame draw:style-name="fr1" draw:name="Image18" text:anchor-type="char" svg:x="-0.136cm" svg:y="0.288cm" svg:width="12.67cm" svg:height="1.109cm" draw:z-index="17"><draw:image xlink:href="Pictures/100000010000098E000000D69D03D2A1.png" xlink:type="simple" xlink:show="embed" xlink:actuate="onLoad" draw:mime-type="image/png"/></draw:frame><text:span text:style-name="T99"/></text:p>
      <text:p text:style-name="P60"><text:span text:style-name="T99"/></text:p>
      <text:p text:style-name="P60"><text:span text:style-name="T99"/></text:p>
      <text:p text:style-name="P60"><text:span text:style-name="T100"/></text:p>
      <text:p text:style-name="P54"><text:span text:style-name="T100"/></text:p>
      <text:p text:style-name="P63"><text:span text:style-name="T100">S</text:span><text:span text:style-name="T86">imilar cases to the previous one:</text:span></text:p>
      <text:list text:continue-numbering="true" text:style-name="L3">
        <text:list-item>
          <text:p text:style-name="P67"><text:soft-page-break/><text:span text:style-name="T80">W</text:span><text:span text:style-name="T59">e find that the star </text:span><text:span text:style-name="T62">7</text:span><text:span text:style-name="T65">01</text:span><text:span text:style-name="T59"> of pg. 6</text:span><text:span text:style-name="T62">8 </text:span><text:span text:style-name="T65">is misidentified with </text:span><text:span text:style-name="T66">OA 1764</text:span><text:span text:style-name="T65">3, however its position and the one for OA 17642 are near to each other, and the same as PPM 234052 (with</text:span><text:span text:style-name="T79">in</text:span><text:span text:style-name="T65"> 7 arcsec).</text:span></text:p>
        </text:list-item>
        <text:list-item>
          <text:p text:style-name="P72"><text:span text:style-name="T65">W</text:span><text:span text:style-name="T57">e find that the star 35 of pg. 232 is misidentified with OA 1098, however its position and the one for OA 1091 are near to each other, and the same as PPM 244325 (within 4 arcsec).</text:span></text:p>
        </text:list-item>
      </text:list>
      <text:p text:style-name="P54"><text:span text:style-name="T100"/></text:p>
      <text:p text:style-name="P54"><text:span text:style-name="T100"/></text:p>
      <text:list text:continue-numbering="true" text:style-name="L3">
        <text:list-item>
          <text:p text:style-name="P68"><text:span text:style-name="T100">In </text:span><text:span text:style-name="T82">Resultados del Observatorio Nacional Argentino, Vol XV</text:span><text:span text:style-name="T83">III</text:span><text:span text:style-name="T70">, there is a corrigenda to previous works, in particular in pg. XLVI says that ZC 08</text:span><text:span text:style-name="T30">h</text:span><text:span text:style-name="T70"> 1062 does not exists </text:span><text:span text:style-name="T71">(see below):</text:span></text:p>
          <text:p text:style-name="P68"><text:span text:style-name="T70"><text:s text:c="3"/></text:span><text:span text:style-name="T82"><text:s/></text:span><text:span text:style-name="T99"><text:line-break/></text:span><draw:frame draw:style-name="fr3" draw:name="Image11" text:anchor-type="char" svg:width="12.843cm" svg:height="0.868cm" draw:z-index="10"><draw:image xlink:href="Pictures/100000010000095C000000A2559A9040.png" xlink:type="simple" xlink:show="embed" xlink:actuate="onLoad" draw:mime-type="image/png"/></draw:frame></text:p>
        </text:list-item>
      </text:list>
      <text:p text:style-name="P57"><text:span text:style-name="T101">The same is fu</text:span><text:span text:style-name="T105">r</text:span><text:span text:style-name="T101">ther reported in </text:span><text:span text:style-name="T43">[</text:span><text:span text:style-name="T46">Minniti</text:span><text:span text:style-name="T43">]</text:span><text:span text:style-name="T101"> in the first entry of its list. Below, on the </text:span><text:span text:style-name="T102">left</text:span><text:span text:style-name="T101">, we see the coordinates of the star (08</text:span><text:span text:style-name="T32">h</text:span><text:span text:style-name="T101">12</text:span><text:span text:style-name="T32">m</text:span><text:span text:style-name="T101">53</text:span><text:span text:style-name="T32">s</text:span><text:span text:style-name="T101">96 -24</text:span><text:span text:style-name="T60">°</text:span><text:span text:style-name="T101">12</text:span><text:span text:style-name="T99">'</text:span><text:span text:style-name="T101">43</text:span><text:span text:style-name="T99">''</text:span><text:span text:style-name="T101">6) given in </text:span><text:span text:style-name="T82">Resultados del Observatorio Nacional Argentino, Vol </text:span><text:span text:style-name="T84">VII</text:span><text:span text:style-name="T70">, </text:span><text:span text:style-name="T71">pg. 212, note the Zone and </text:span><text:span text:style-name="T78">N</text:span><text:span text:style-name="T71">umber: </text:span><text:span text:style-name="T84">230</text:span><text:span text:style-name="T71">, </text:span><text:span text:style-name="T84">43</text:span><text:span text:style-name="T71">. </text:span><text:span text:style-name="T73">Our discovery was that </text:span><text:span text:style-name="T77">it is a typo error in the ZC printed catalog.</text:span><text:span text:style-name="T73"> </text:span><text:span text:style-name="T77">W</text:span><text:span text:style-name="T71">ith these numbers, we can </text:span><text:span text:style-name="T75">track</text:span><text:span text:style-name="T71"> the original observation, </text:span><text:span text:style-name="T72">reported</text:span><text:span text:style-name="T71"> </text:span><text:span text:style-name="T73">(</text:span><text:span text:style-name="T71">in </text:span><text:span text:style-name="T73">this case) in</text:span><text:span text:style-name="T71"> </text:span><text:span text:style-name="T82">Resultados del Observatorio Nacional Argentino, Vol </text:span><text:span text:style-name="T85">III</text:span><text:span text:style-name="T70">, </text:span><text:span text:style-name="T71">pg. </text:span><text:span text:style-name="T72">314 </text:span><text:span text:style-name="T76">(on the right)</text:span><text:span text:style-name="T72">:</text:span></text:p>
      <text:p text:style-name="P54"><draw:frame draw:style-name="fr1" draw:name="Image12" text:anchor-type="char" svg:x="-0.3cm" svg:y="0.296cm" svg:width="6.655cm" svg:height="1.438cm" draw:z-index="11"><draw:image xlink:href="Pictures/10000001000003E8000000D887295184.png" xlink:type="simple" xlink:show="embed" xlink:actuate="onLoad" draw:mime-type="image/png"/></draw:frame><draw:frame draw:style-name="fr1" draw:name="Image13" text:anchor-type="char" svg:x="6.849cm" svg:y="0.118cm" svg:width="11.377cm" svg:height="1.307cm" draw:z-index="12"><draw:image xlink:href="Pictures/10000001000003CF0000007029E83B79.png" xlink:type="simple" xlink:show="embed" xlink:actuate="onLoad" draw:mime-type="image/png"/></draw:frame><text:span text:style-name="T99"/></text:p>
      <text:p text:style-name="P54"><text:span text:style-name="T99"/></text:p>
      <text:p text:style-name="P54"><text:span text:style-name="T99"/></text:p>
      <text:p text:style-name="P58"><text:span text:style-name="T103">The original observation, also a 9</text:span><text:span text:style-name="T33">th</text:span><text:span text:style-name="T103"> magnitude star, reveals the following coordinates for epoch 1875.0:</text:span><text:span text:style-name="T101"> 08</text:span><text:span text:style-name="T32">h</text:span><text:span text:style-name="T101">12</text:span><text:span text:style-name="T32">m</text:span><text:span text:style-name="T101">53</text:span><text:span text:style-name="T32">s</text:span><text:span text:style-name="T101">9</text:span><text:span text:style-name="T103">7</text:span><text:span text:style-name="T101"> -24</text:span><text:span text:style-name="T60">°</text:span><text:span text:style-name="T74">0</text:span><text:span text:style-name="T101">2</text:span><text:span text:style-name="T99">'</text:span><text:span text:style-name="T101">43</text:span><text:span text:style-name="T99">''</text:span><text:span text:style-name="T101">6) </text:span><text:span text:style-name="T103">which differs in 00</text:span><text:span text:style-name="T33">s</text:span><text:span text:style-name="T103">01 in right ascension (negligible) and 10 arcmin in declination, </text:span><text:span text:style-name="T104">manifesting </text:span><text:span text:style-name="T106">the</text:span><text:span text:style-name="T104"> typo error</text:span><text:span text:style-name="T103">. Th</text:span><text:span text:style-name="T107">e original observation</text:span><text:span text:style-name="T103"> can </text:span><text:span text:style-name="T107">indeed </text:span><text:span text:style-name="T103">be cross-identified with 10</text:span><text:span text:style-name="T33">th</text:span><text:span text:style-name="T103"> magnitude CD -24°6767 (52 arcsec) and 11</text:span><text:span text:style-name="T33">th</text:span><text:span text:style-name="T103"> magnitude </text:span><text:span text:style-name="T74">TYC 6560-648-1 (42 arcsec).</text:span></text:p>
      <text:p text:style-name="P59"><text:span text:style-name="T74"/></text:p>
      <text:p text:style-name="P61"><text:span text:style-name="T74">W</text:span><text:span text:style-name="T57">e performed the same work with the second and third entry of the list of </text:span><text:span text:style-name="T43">[</text:span><text:span text:style-name="T46">Minniti</text:span><text:span text:style-name="T43">]</text:span><text:span text:style-name="T57">, but we didn’t find differences between the position of ZC and the original observations (for ZC 08</text:span><text:span text:style-name="T28">h</text:span><text:span text:style-name="T57"> 1308, 08</text:span><text:span text:style-name="T28">h</text:span><text:span text:style-name="T57">15</text:span><text:span text:style-name="T28">m</text:span><text:span text:style-name="T57">55</text:span><text:span text:style-name="T28">s</text:span><text:span text:style-name="T57">02 -43°59'45''9, mag 9.5, the original observation is in </text:span><text:span text:style-name="T81">Vol VI</text:span><text:span text:style-name="T57">, pg. 259, Zone 627, Number 9; for ZC 08</text:span><text:span text:style-name="T28">h</text:span><text:span text:style-name="T57"> 3084, 08</text:span><text:span text:style-name="T28">h</text:span><text:span text:style-name="T57">37</text:span><text:span text:style-name="T28">m</text:span><text:span text:style-name="T57">28</text:span><text:span text:style-name="T28">s</text:span><text:span text:style-name="T57">91 -31°57'38''9, mag 9.0, the original observation is in </text:span><text:span text:style-name="T81">Vol V</text:span><text:span text:style-name="T57">, pg. 489, Zone 609, Number 117, here it just differs in magnitude, being 9.5 in the original register).</text:span></text:p>
      <text:p text:style-name="P54"><text:span text:style-name="T99"/></text:p>
      <text:p text:style-name="P54"><text:span text:style-name="T99"/></text:p>
      <text:p text:style-name="P35">Note <text:span text:style-name="T56">6:</text:span> <text:span text:style-name="T14"><text:s/></text:span><text:span text:style-name="T16">Errors f</text:span><text:span text:style-name="T14">o</text:span><text:span text:style-name="T11">und in </text:span><text:span text:style-name="T16">printed</text:span><text:span text:style-name="T11"> version</text:span><text:span text:style-name="T16">s</text:span><text:span text:style-name="T11"> of </text:span><text:span text:style-name="T19">other old</text:span><text:span text:style-name="T16"> Catalogs.</text:span></text:p>
      <text:p text:style-name="P45"/>
      <text:list text:style-name="L4">
        <text:list-item>
          <text:p text:style-name="P69"><text:span text:style-name="T67">In Yarnall-Frisby USNO </text:span><text:span text:style-name="T68">printed </text:span><text:span text:style-name="T67">catalog </text:span><text:span text:style-name="T43">[</text:span><text:span text:style-name="T45">U</text:span><text:span text:style-name="T43">]</text:span><text:span text:style-name="T67">, the star 5990</text:span><text:span text:style-name="T66"> </text:span><text:span text:style-name="T67">is identified with OARS 14403 </text:span><text:span text:style-name="T43">[</text:span><text:span text:style-name="T44">OARS</text:span><text:span text:style-name="T43">]</text:span><text:span text:style-name="T67">, however the latter catalog only </text:span><text:span text:style-name="T58">covers</text:span><text:span text:style-name="T67"> the southern hemisphere. On the other hand, a search in SIMBAD of the star OARN 14403 (14</text:span><text:span text:style-name="T29">h</text:span><text:span text:style-name="T67">08</text:span><text:span text:style-name="T29">m</text:span><text:span text:style-name="T67">35</text:span><text:span text:style-name="T29">s</text:span><text:span text:style-name="T67">90 +57</text:span><text:span text:style-name="T60">°</text:span><text:span text:style-name="T67">03</text:span><text:span text:style-name="T60">'</text:span><text:span text:style-name="T67">29</text:span><text:span text:style-name="T60">''</text:span><text:span text:style-name="T67">4 </text:span><text:span text:style-name="T69">at epoch 1842.0</text:span><text:span text:style-name="T67">) </text:span><text:span text:style-name="T69">gives the star PPM 3440 which is identified to the star 5990, so below it should be corrected to “O. Arg. N. 14403”:</text:span></text:p>
        </text:list-item>
      </text:list>
      <text:p text:style-name="P56"><draw:frame draw:style-name="fr1" draw:name="Image5" text:anchor-type="char" svg:x="-0.296cm" svg:y="0.28cm" svg:width="17cm" svg:height="0.596cm" draw:z-index="7"><draw:image xlink:href="Pictures/100000010000063A00000038313F1DEF.png" xlink:type="simple" xlink:show="embed" xlink:actuate="onLoad" draw:mime-type="image/png"/></draw:frame><text:span text:style-name="T87"/></text:p>
      <text:list text:continue-numbering="true" text:style-name="L4">
        <text:list-header>
          <text:p text:style-name="P73">Same mistake happens in star U 9903 identified with OARN 21803, but it should be OARS. <text:span text:style-name="T120">Another misidentification happen</text:span>s<text:span text:style-name="T120"> in star U 8583, identified with BD +19</text:span><text:span text:style-name="T118">°</text:span><text:span text:style-name="T120">4170 but it is far from that star and, on the other hand, is very near to BD +19</text:span><text:span text:style-name="T118">°</text:span><text:span text:style-name="T120">4070 (PPM 136547). </text:span><text:span text:style-name="T119">Also, a misidentification occurs with the star U 8888, identified with OARS 20215 (below are the coordinate in both catalogs), whose distance is 710 arcsec:</text:span></text:p>
          <text:p text:style-name="P70"><text:span text:style-name="T87"><text:line-break/></text:span><draw:frame draw:style-name="fr3" draw:name="Image15" text:anchor-type="char" svg:width="12.905cm" svg:height="1.016cm" draw:z-index="14"><draw:image xlink:href="Pictures/100000010000065A0000008025FAF4CC.png" xlink:type="simple" xlink:show="embed" xlink:actuate="onLoad" draw:mime-type="image/png"/></draw:frame><text:span text:style-name="T87"><text:line-break/></text:span></text:p>
          <text:p text:style-name="P71"><draw:frame draw:style-name="fr2" draw:name="Image16" text:anchor-type="char" svg:width="10.123cm" svg:height="0.889cm" draw:z-index="15"><draw:image xlink:href="Pictures/100000010000026800000036D9845269.png" xlink:type="simple" xlink:show="embed" xlink:actuate="onLoad" draw:mime-type="image/png"/></draw:frame><text:span text:style-name="T87"/></text:p>
          <text:p text:style-name="P71"><text:span text:style-name="T87"/></text:p>
        </text:list-header>
      </text:list>
      <text:p text:style-name="P55"><text:span text:style-name="T87"/></text:p>
      <text:p text:style-name="P55"><text:soft-page-break/><text:span text:style-name="T87"><text:tab/></text:span><text:span text:style-name="T111">Here, the USNO star corresponds to PPM 236935 while the OA star corresponds to<text:line-break/><text:tab/>PPM 236913 (both identification are within 2 arcsec). </text:span><text:span text:style-name="T112">Another is U 1121 wrongly cross-<text:tab/>matched with OARS 1531, but the correct one is OARS 1551 (note that next star U 1122 is <text:tab/>matched with OARS 1554). </text:span><text:span text:style-name="T113">Same for U 3011 (OARS 7536 → 6536), U 6811 (OARS 16358 <text:tab/>→ 15358) </text:span><text:span text:style-name="T115">and</text:span><text:span text:style-name="T113"> </text:span><text:span text:style-name="T114">U 7541 (Lalande 23418 → 32418). </text:span></text:p>
      <text:list text:continue-numbering="true" text:style-name="L4">
        <text:list-header>
          <text:p text:style-name="P71"><text:span text:style-name="T87"/></text:p>
        </text:list-header>
        <text:list-item>
          <text:p text:style-name="P71"><text:span text:style-name="T87">In Gilliss printed catalog </text:span><text:span text:style-name="T47">[G]</text:span><text:span text:style-name="T87">,</text:span><text:span text:style-name="T88"> G 1819 is identified with GC 3450 but th</text:span><text:span text:style-name="T87">e position of this</text:span><text:span text:style-name="T88"> star is too far, outside of the G coverage </text:span><text:span text:style-name="T91">of the sky</text:span><text:span text:style-name="T88">. However, G 1819 and GC 3451 corresponds to the same star PPM 376205 (less that 2 arcsec of difference). </text:span><text:span text:style-name="T89">Same happens for G 11329 misidentified with GC 21512, </text:span><text:span text:style-name="T90">when the correct one should be GC 21498 (both are PPM 372887), </text:span><text:span text:style-name="T108">G 11592 misidentified with GC 21922 but the correct is GC 21932 (both are PPM 373015), </text:span><text:span text:style-name="T109">and G 15240 misidentified with GC 29447 but the correct is GC 29477 (both are PPM 365260).</text:span></text:p>
          <text:p text:style-name="P71"><text:span text:style-name="T109"/></text:p>
        </text:list-item>
        <text:list-item>
          <text:p text:style-name="P74"><text:span text:style-name="T109">A </text:span><text:span text:style-name="T86">clear misidentification is in G 15367 with is misidentified with ZC 11</text:span><text:span text:style-name="T31">h</text:span><text:span text:style-name="T86"> 1191, but the former is in 21</text:span><text:span text:style-name="T31">h</text:span><text:span text:style-name="T86"> of right ascension. By finding, the coordinates of ZC 21</text:span><text:span text:style-name="T31">h</text:span><text:span text:style-name="T86"> 1191 (given below), we noticed that both stars (G and ZC) are identified with PPM 375168 within 2 arcsec.</text:span></text:p>
        </text:list-item>
      </text:list>
      <text:p text:style-name="P62"><draw:frame draw:style-name="fr1" draw:name="Image14" text:anchor-type="char" svg:x="2.656cm" svg:y="0.146cm" svg:width="7.045cm" svg:height="0.616cm" draw:z-index="13"><draw:image xlink:href="Pictures/10000001000001630000001FBE9660E2.png" xlink:type="simple" xlink:show="embed" xlink:actuate="onLoad" draw:mime-type="image/png"/></draw:frame><text:span text:style-name="T86"/></text:p>
      <text:p text:style-name="P62"><text:span text:style-name="T86"><text:line-break/><text:tab/></text:span><text:span text:style-name="T110">Something similar happens with G 5509 and G 5548.</text:span></text:p>
      <text:p text:style-name="P19"/>
      <text:list text:continue-numbering="true" text:style-name="L4">
        <text:list-item>
          <text:p text:style-name="P71"><text:span text:style-name="T92">Another </text:span><text:span text:style-name="T87">misidentifications (</text:span><text:span text:style-name="T98">although</text:span><text:span text:style-name="T87"> </text:span><text:span text:style-name="T98">we don’t be able to establish </text:span><text:span text:style-name="T87">the correct identification) are the followings: </text:span><text:span text:style-name="T92">G 3222 </text:span><text:span text:style-name="T87">is </text:span><text:span text:style-name="T92">identified with GC 6499, but this star is roughly 1 degree away. However, both stars are identified with </text:span><text:span text:style-name="T93">(different) </text:span><text:span text:style-name="T92">PPM stars. Same happens for G 4959 </text:span><text:span text:style-name="T94">vs.</text:span><text:span text:style-name="T92"> GC 9878, </text:span><text:span text:style-name="T94">G 5474 vs. GC 12220, </text:span><text:span text:style-name="T95">G 6538 vs. GC 13472, G 9034 </text:span><text:span text:style-name="T96">vs.</text:span><text:span text:style-name="T95"> GC 17759, G 9382 </text:span><text:span text:style-name="T93">vs.</text:span><text:span text:style-name="T95"> GC 18389, </text:span><text:span text:style-name="T97">and</text:span><text:span text:style-name="T95"> G 10239 </text:span><text:span text:style-name="T97">vs.</text:span><text:span text:style-name="T95"> GC 18798.</text:span></text:p>
          <text:p text:style-name="P75"><text:span text:style-name="T95">A</text:span><text:span text:style-name="T86">lso G 14324 and G 14338 are identified with the same ZC 19</text:span><text:span text:style-name="T31">h</text:span><text:span text:style-name="T86"> 2223, but only the latter is near the position of ZC. The only thing we know about G 14324 is that it is in </text:span><text:span text:style-name="T81">Octantis</text:span><text:span text:style-name="T86">.</text:span></text:p>
        </text:list-item>
      </text:list>
      <text:p text:style-name="P11"><text:span text:style-name="T11"/></text:p>
      <text:p text:style-name="P37"><text:span text:style-name="T11"/></text:p>
      <text:p text:style-name="P38">Note <text:span text:style-name="T116">7</text:span>: <text:span text:style-name="T11">Possible historical observation of a Nova.</text:span></text:p>
      <text:p text:style-name="P47"/>
      <text:p text:style-name="P48">The star CD -25°12601 (mag. 7.3) was reported as “inexistent” in the paper <text:span text:style-name="T41">[</text:span><text:span text:style-name="T35">Thome1895</text:span><text:span text:style-name="T42">b</text:span><text:span text:style-name="T41">]</text:span>. <text:span text:style-name="T51">The same star is also mentioned in </text:span><text:span text:style-name="T41">[</text:span><text:span text:style-name="T35">Thome1895</text:span><text:span text:style-name="T42">a</text:span><text:span text:style-name="T41">]</text:span>. <text:span text:style-name="T51">A SIMBAD search shows several very dim stars in the neighborhood of the position of </text:span>CD -25°12601, <text:span text:style-name="T51">however</text:span> V4742 Sgr (<text:span text:style-name="T51">also</text:span> Nova Sgr 2002b) <text:span text:style-name="T51">is</text:span> 83 arcsec. <text:span text:style-name="T51">away. The latter was reported to reach </text:span>8<text:span text:style-name="T51">th</text:span>. magnitud<text:span text:style-name="T51">e</text:span> <text:span text:style-name="T51">in</text:span> 2002. <text:span text:style-name="T51">So, there exists a possibility that this Nova were recurrent and Thome had observed it in a previous maximum.</text:span></text:p>
      <text:p text:style-name="P47">Link <text:span text:style-name="T51">about the 2002 discovery</text:span>: <text:a xlink:type="simple" xlink:href="https://www.institutocopernico.org/vs/v4742sgr.php" text:style-name="Internet_20_link" text:visited-style-name="Visited_20_Internet_20_Link">https://www.institutocopernico.org/vs/v4742sgr.php</text:a> </text:p>
      <text:p text:style-name="P37"><text:span text:style-name="T11"/></text:p>
      <text:p text:style-name="P37"><text:span text:style-name="T11"/></text:p>
      <text:p text:style-name="P46"/>
      <text:p text:style-name="P51">Bibliography catalogs <text:span text:style-name="T50">and papers</text:span></text:p>
      <text:p text:style-name="P43"><text:span text:style-name="T11"/></text:p>
      <text:p text:style-name="P44"><text:span text:style-name="T36">[G]</text:span><text:span text:style-name="T11"> </text:span><text:span text:style-name="T20">Gilliss. </text:span><text:span text:style-name="T11">A catalogue of 16748 southern stars deduced by the United States Naval Observatory from the zone observations made at Santiago de Chile.</text:span></text:p>
      <text:p text:style-name="P37"><text:span text:style-name="T11"/></text:p>
      <text:p text:style-name="P39"><text:span text:style-name="T36">[</text:span><text:span text:style-name="T38">OARS</text:span><text:span text:style-name="T36">]</text:span><text:span text:style-name="T11"> </text:span><text:span text:style-name="T21">Oeltzen</text:span><text:span text:style-name="T11">Argelander's Zonen-Beobachtungen vom 15. bis 31. Grade südlicher Declination, in mittleren Positionen für 1850.0.</text:span></text:p>
      <text:p text:style-name="P39"><text:span text:style-name="T11"/></text:p>
      <text:p text:style-name="P40"><text:span text:style-name="T36">[</text:span><text:span text:style-name="T38">OAR</text:span><text:span text:style-name="T40">N</text:span><text:span text:style-name="T36">]</text:span><text:span text:style-name="T11"> Oeltzen-Argelander's Zonen-Beobachtungen vom 45. bis 80. Grade noerdlicher Declina-tion in mittleren Positionen für 1842.0.</text:span></text:p>
      <text:p text:style-name="P40"><text:span text:style-name="T11"/></text:p>
      <text:p text:style-name="P41"><text:span text:style-name="T36">[</text:span><text:span text:style-name="T39">U</text:span><text:span text:style-name="T36">]</text:span><text:span text:style-name="T11"> Yarnall, Frisby. Catalogue of stars observed at the USNO during years 1845 to 1877. 3rd. Ed.</text:span></text:p>
      <text:p text:style-name="P40"><text:span text:style-name="T11"/></text:p>
      <text:p text:style-name="P48"><text:span text:style-name="T41">[</text:span><text:span text:style-name="T35">Thome1895</text:span><text:span text:style-name="T42">a</text:span><text:span text:style-name="T41">]</text:span> Thome. Notes on Variable Stars, AJ 360, 1895.</text:p>
      <text:p text:style-name="P53"/>
      <text:p text:style-name="P47"><text:span text:style-name="T41">[</text:span><text:span text:style-name="T35">Thome1895</text:span><text:span text:style-name="T42">b</text:span><text:span text:style-name="T41">]</text:span> Thome. List of Additional Errors found in the Cordoba Catalogues, AJ 364, 1895.</text:p>
      <text:p text:style-name="P47"><text:soft-page-break/></text:p>
      <text:p text:style-name="P49"><text:span text:style-name="T41">[</text:span><text:span text:style-name="T48">Minniti</text:span><text:span text:style-name="T41">]</text:span> Minniti Morgan, Estrellas del C<text:span text:style-name="T117">ordoba Durchmusterung</text:span> ausentes:</text:p>
      <text:p text:style-name="P49"><text:a xlink:type="simple" xlink:href="https://historiadelaastronomia.wordpress.com/wp-content/uploads/2020/12/estrellas_ausentes.pdf" text:style-name="Internet_20_link" text:visited-style-name="Visited_20_Internet_20_Link">https://historiadelaastronomia.wordpress.com/wp-content/uploads/2020/12/estrellas_ausentes.pdf</text:a> </text:p>
      <text:p text:style-name="P49"><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5T14:40:49.793406932</meta:creation-date>
    <dc:date>2026-07-18T19:41:41.900874904</dc:date>
    <meta:editing-duration>PT6H42M29S</meta:editing-duration>
    <meta:editing-cycles>68</meta:editing-cycles>
    <meta:generator>LibreOffice/24.2.5.2$MacOSX_X86_64 LibreOffice_project/bffef4ea93e59bebbeaf7f431bb02b1a39ee8a59</meta:generator>
    <meta:document-statistic meta:table-count="2" meta:image-count="20" meta:object-count="0" meta:page-count="5" meta:paragraph-count="108" meta:word-count="1540" meta:character-count="8992" meta:non-whitespace-character-count="7548"/>
  </office:meta>
</office:document-meta>
</file>